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 Sans VF" svg:font-family="'Mona Sans VF', apple-system, BlinkMacSystemFont, 'Segoe UI', 'Noto Sans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1f2328" style:font-name="Mona Sans VF" fo:font-size="12pt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ADME.md</text:span> </text:p>
      <text:p text:style-name="Standard"/>
      <text:p text:style-name="Standard"># 👋 Welcome to My GitHub Profile</text:p>
      <text:p text:style-name="Standard"/>
      <text:p text:style-name="Standard">**Blockchain Developer &amp; Memtoken Creator** | Building on **Solana** with **Raydium.io**</text:p>
      <text:p text:style-name="Standard"/>
      <text:p text:style-name="Standard">---</text:p>
      <text:p text:style-name="Standard"/>
      <text:p text:style-name="Standard">## 🚀 About Me</text:p>
      <text:p text:style-name="Standard"/>
      <text:p text:style-name="Standard">I'm a blockchain developer and crypto enthusiast focused on creating innovative memtokens on the Solana network. I specialize in building projects using Raydium.io and fostering strong communities around Web3 initiatives.</text:p>
      <text:p text:style-name="Standard"/>
      <text:p text:style-name="Standard">- 🔗 **Blockchain Focus**: Solana Network &amp; DeFi Projects</text:p>
      <text:p text:style-name="Standard">- 💎 **Creator**: Multiple memtokens with active communities</text:p>
      <text:p text:style-name="Standard">- 🌱 **Builder**: Leveraging Raydium.io for token launches</text:p>
      <text:p text:style-name="Standard">- 🤝 **Community Focused**: Engaging across multiple platforms</text:p>
      <text:p text:style-name="Standard">- ✨ **Mission**: Creating valuable Web3 experiences</text:p>
      <text:p text:style-name="Standard"/>
      <text:p text:style-name="Standard">---</text:p>
      <text:p text:style-name="Standard"/>
      <text:p text:style-name="Standard">## 💎 Featured Projects</text:p>
      <text:p text:style-name="Standard"/>
      <text:p text:style-name="Standard">### **KPGM** - Key Power Grail Mystery</text:p>
      <text:p text:style-name="Standard">- **Token Address**: `EBRBXt79AyC2TVDLQAoBB6L7fgsctqS7DTevkwPuhray`</text:p>
      <text:p text:style-name="Standard">- **Platform**: Raydium.io</text:p>
      <text:p text:style-name="Standard">- **Status**: Active &amp; Growing Community</text:p>
      <text:p text:style-name="Standard">- **Description**: Strong community-driven memtoken on Solana</text:p>
      <text:p text:style-name="Standard"/>
      <text:p text:style-name="Standard">### **JKPGM**</text:p>
      <text:p text:style-name="Standard">- **Token Address**: `8bHmWm3vRUqfpXKszGnYyzLbwMtcN9bb7bZceUatEray`</text:p>
      <text:p text:style-name="Standard">- **Platform**: Raydium.io</text:p>
      <text:p text:style-name="Standard"/>
      <text:p text:style-name="Standard">### **XRPTC**</text:p>
      <text:p text:style-name="Standard">- **Token Address**: `D3a2hQhYJsaU7UUuJgjmDzLhSaohWP9PCmm6Umip8ray`</text:p>
      <text:p text:style-name="Standard">- **Platform**: Raydium.io</text:p>
      <text:p text:style-name="Standard"/>
      <text:p text:style-name="Standard">---</text:p>
      <text:p text:style-name="Standard"/>
      <text:p text:style-name="Standard">## 🔗 Connect With Me</text:p>
      <text:p text:style-name="Standard"/>
      <text:p text:style-name="Standard">### Social Networks</text:p>
      <text:p text:style-name="Standard">- 🐦 **X/Twitter**: [@KpgmSol](https://x.com/KpgmSol) | [@IosypDavyd1985](https://x.com/IosypDavyd1985) | [@SerafimCoin444](https://x.com/SerafimCoin444)</text:p>
      <text:p text:style-name="Standard">- 📱 **Telegram**: [KPGM_SOL](https://t.me/KPGM_SOL) | [Community Group](https://t.me/+q9VhY8ypidxiNjRk)</text:p>
      <text:p text:style-name="Standard">- 💬 **Discord**: [Join Server](https://discord.gg/2VWXC2az)</text:p>
      <text:p text:style-name="Standard">- 📺 **YouTube**: [@iosypdavyd_books](https://youtube.com/@iosypdavyd_books?si=2S6J8KFf6U_iLOD8)</text:p>
      <text:p text:style-name="Standard">- 🎬 **TikTok**: [@kpgm2026](https://tiktok.com/@kpgm2026)</text:p>
      <text:p text:style-name="Standard">- 📖 **Medium**: [@ruslanmatey](https://medium.com/@ruslanmatey)</text:p>
      <text:p text:style-name="Standard"><text:soft-page-break/></text:p>
      <text:p text:style-name="Standard">### Professional Networks</text:p>
      <text:p text:style-name="Standard">- 💼 **LinkedIn**: [Iosyp Davyd](https://www.linkedin.com/in/iosyp-davyd-01bbb82b4)</text:p>
      <text:p text:style-name="Standard">- 📘 **Facebook**: [Yosip David](https://www.facebook.com/yosip.david)</text:p>
      <text:p text:style-name="Standard">- 🖼️ **Instagram**: [@serafim4442025](https://www.instagram.com/serafim4442025)</text:p>
      <text:p text:style-name="Standard">- 🔍 **Reddit**: [Decent_Impression653](https://www.reddit.com/u/Decent_Impression653)</text:p>
      <text:p text:style-name="Standard"/>
      <text:p text:style-name="Standard">### Crypto Platforms</text:p>
      <text:p text:style-name="Standard">- 📊 **CoinMarketCap**: @User_hzov86453813</text:p>
      <text:p text:style-name="Standard">- 📈 **Gecko Terminal**: @User_hzov86453813</text:p>
      <text:p text:style-name="Standard"/>
      <text:p text:style-name="Standard">---</text:p>
      <text:p text:style-name="Standard"/>
      <text:p text:style-name="Standard">## 🛠️ Skills &amp; Technologies</text:p>
      <text:p text:style-name="Standard"/>
      <text:p text:style-name="Standard">- **Blockchain**: Solana, Smart Contracts</text:p>
      <text:p text:style-name="Standard">- **DeFi Platforms**: Raydium.io, SPL Tokens</text:p>
      <text:p text:style-name="Standard">- **Community Building**: Discord, Telegram, Social Media Management</text:p>
      <text:p text:style-name="Standard">- **Content Creation**: YouTube, TikTok, Medium, Twitter</text:p>
      <text:p text:style-name="Standard">- **Crypto Analytics**: CoinMarketCap, Gecko Terminal</text:p>
      <text:p text:style-name="Standard"/>
      <text:p text:style-name="Standard">---</text:p>
      <text:p text:style-name="Standard"/>
      <text:p text:style-name="Standard">## 📊 GitHub Statistics</text:p>
      <text:p text:style-name="Standard"/>
      <text:p text:style-name="Standard">![GitHub Stats](https://github-readme-stats.vercel.app/api?username=IosypDavyd&amp;show_icons=true&amp;theme=radical)</text:p>
      <text:p text:style-name="Standard"/>
      <text:p text:style-name="Standard">![Top Languages](https://github-readme-stats.vercel.app/api/top-langs/?username=IosypDavyd&amp;layout=compact&amp;theme=radical)</text:p>
      <text:p text:style-name="Standard"/>
      <text:p text:style-name="Standard">---</text:p>
      <text:p text:style-name="Standard"/>
      <text:p text:style-name="Standard">## 🎯 My Mission</text:p>
      <text:p text:style-name="Standard"/>
      <text:p text:style-name="Standard">Building sustainable Web3 projects with:</text:p>
      <text:p text:style-name="Standard">- ✅ Strong, engaged communities</text:p>
      <text:p text:style-name="Standard">- ✅ Transparent development practices</text:p>
      <text:p text:style-name="Standard">- ✅ Multi-platform presence &amp; engagement</text:p>
      <text:p text:style-name="Standard">- ✅ Innovative tokenomics on Solana</text:p>
      <text:p text:style-name="Standard"/>
      <text:p text:style-name="Standard">---</text:p>
      <text:p text:style-name="Standard"/>
      <text:p text:style-name="Standard">## 📈 Let's Collaborate</text:p>
      <text:p text:style-name="Standard"/>
      <text:p text:style-name="Standard">I'm always open to:</text:p>
      <text:p text:style-name="Standard">- 🤝 Collaborating on blockchain projects</text:p>
      <text:p text:style-name="Standard">- 💡 Discussing Web3 innovations</text:p>
      <text:p text:style-name="Standard">- 🚀 Building communities around shared interests</text:p>
      <text:p text:style-name="Standard">- 📡 Cross-platform partnerships</text:p>
      <text:p text:style-name="Standard"/>
      <text:p text:style-name="Standard">---</text:p>
      <text:p text:style-name="Standard"><text:soft-page-break/></text:p>
      <text:p text:style-name="Standard">## ⭐ Support My Work</text:p>
      <text:p text:style-name="Standard"/>
      <text:p text:style-name="Standard">If you find value in my projects:</text:p>
      <text:p text:style-name="Standard">- ⭐ Star my repositories</text:p>
      <text:p text:style-name="Standard">- 🔔 Follow on social media</text:p>
      <text:p text:style-name="Standard">- 💬 Join our community</text:p>
      <text:p text:style-name="Standard">- 🤝 Share feedback and ideas</text:p>
      <text:p text:style-name="Standard"/>
      <text:p text:style-name="Standard">---</text:p>
      <text:p text:style-name="Standard"/>
      <text:p text:style-name="Standard">**"Building the future of Web3, one token at a time."** 🚀✨</text:p>
      <text:p text:style-name="Standard"/>
      <text:p text:style-name="Standard">Last Updated: May 202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 Sans VF" svg:font-family="'Mona Sans VF', apple-system, BlinkMacSystemFont, 'Segoe UI', 'Noto Sans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6-13T15:06:00.48</meta:creation-date>
    <meta:editing-duration>PT29S</meta:editing-duration>
    <meta:editing-cycles>2</meta:editing-cycles>
    <meta:generator>OpenOffice/4.1.15$Win32 OpenOffice.org_project/4115m2$Build-9813</meta:generator>
    <meta:initial-creator>iosyp davyd</meta:initial-creator>
    <meta:document-statistic meta:table-count="0" meta:image-count="0" meta:object-count="0" meta:page-count="3" meta:paragraph-count="76" meta:word-count="380" meta:character-count="3346"/>
    <dc:date>2026-06-13T15:06:25.44</dc:date>
    <dc:creator>iosyp davyd</dc:creator>
  </office:meta>
</office:document-meta>
</file>