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 Sans VF" svg:font-family="'Mona Sans VF', apple-system, BlinkMacSystemFont, 'Segoe UI', 'Noto Sans', Helvetica, Arial, sans-serif, 'Apple Color Emoji', 'Segoe UI Emoji'"/>
    <style:font-face style:name="Monaspace Neon" svg:font-family="'Monaspace Neon', ui-monospace, SFMono-Regular, 'SF Mono', Menlo, Consolas, 'Liberation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fo:line-height="150%" fo:orphans="2" fo:widows="2" fo:text-indent="0cm" style:auto-text-indent="false"/>
      <style:text-properties fo:font-variant="normal" fo:text-transform="none" fo:color="#1f2328" fo:letter-spacing="normal"/>
    </style:style>
    <style:style style:name="P2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1f2328" style:font-name="Mona Sans VF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0969da" fo:letter-spacing="normal" style:text-underline-style="solid" style:text-underline-width="auto" style:text-underline-color="font-color"/>
    </style:style>
    <style:style style:name="P4" style:family="paragraph" style:parent-style-name="Text_20_body">
      <style:paragraph-properties fo:margin-left="0cm" fo:margin-right="0cm" fo:margin-top="0cm" fo:margin-bottom="0.423cm" fo:orphans="2" fo:widows="2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margin-top="0cm" fo:margin-bottom="0cm" fo:line-height="150%" fo:orphans="2" fo:widows="2" fo:text-indent="0cm" style:auto-text-indent="false"/>
    </style:style>
    <style:style style:name="P6" style:family="paragraph" style:parent-style-name="Text_20_body" style:list-style-name="L4">
      <style:paragraph-properties fo:margin-left="0cm" fo:margin-right="0cm" fo:margin-top="0cm" fo:margin-bottom="0cm" fo:orphans="2" fo:widows="2" fo:text-indent="0cm" style:auto-text-indent="false"/>
    </style:style>
    <style:style style:name="P7" style:family="paragraph" style:parent-style-name="Text_20_body" style:list-style-name="L5">
      <style:paragraph-properties fo:margin-left="0cm" fo:margin-right="0cm" fo:margin-top="0cm" fo:margin-bottom="0cm" fo:orphans="2" fo:widows="2" fo:text-indent="0cm" style:auto-text-indent="false"/>
    </style:style>
    <style:style style:name="P8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1f2328" style:font-name="Mona Sans VF" fo:font-size="12pt" fo:letter-spacing="normal" fo:font-style="normal" fo:font-weight="normal"/>
    </style:style>
    <style:style style:name="P10" style:family="paragraph" style:parent-style-name="Text_20_body">
      <style:paragraph-properties fo:margin-top="0cm" fo:margin-bottom="0.423cm" fo:line-height="150%" fo:orphans="2" fo:widows="2"/>
      <style:text-properties fo:font-variant="normal" fo:text-transform="none" fo:color="#1f2328" style:font-name="Mona Sans VF" fo:font-size="12pt" fo:letter-spacing="normal" fo:font-style="normal" fo:font-weight="normal"/>
    </style:style>
    <style:style style:name="P11" style:family="paragraph" style:parent-style-name="Text_20_body" style:list-style-name="L1">
      <style:paragraph-properties fo:margin-top="0cm" fo:margin-bottom="0.423cm" fo:line-height="150%" fo:orphans="2" fo:widows="2"/>
      <style:text-properties fo:font-variant="normal" fo:text-transform="none" fo:color="#1f2328" style:font-name="Mona Sans VF" fo:font-size="12pt" fo:letter-spacing="normal" fo:font-style="normal" fo:font-weight="normal"/>
    </style:style>
    <style:style style:name="P12" style:family="paragraph" style:parent-style-name="Text_20_body" style:list-style-name="L12">
      <style:paragraph-properties fo:margin-top="0cm" fo:margin-bottom="0.423cm" fo:orphans="2" fo:widows="2"/>
      <style:text-properties fo:font-variant="normal" fo:text-transform="none" fo:color="#1f2328" style:font-name="Mona Sans VF" fo:font-size="12pt" fo:letter-spacing="normal" fo:font-style="normal" fo:font-weight="normal"/>
    </style:style>
    <style:style style:name="P13" style:family="paragraph" style:parent-style-name="Text_20_body" style:list-style-name="L13">
      <style:paragraph-properties fo:margin-top="0cm" fo:margin-bottom="0.423cm" fo:orphans="2" fo:widows="2"/>
      <style:text-properties fo:font-variant="normal" fo:text-transform="none" fo:color="#1f2328" style:font-name="Mona Sans VF" fo:font-size="12pt" fo:letter-spacing="normal" fo:font-style="normal" fo:font-weight="normal"/>
    </style:style>
    <style:style style:name="P14" style:family="paragraph" style:parent-style-name="Text_20_body" style:list-style-name="L11">
      <style:paragraph-properties fo:margin-top="0cm" fo:margin-bottom="0.423cm" fo:orphans="2" fo:widows="2"/>
      <style:text-properties fo:font-variant="normal" fo:text-transform="none" fo:color="#1f2328" fo:letter-spacing="normal"/>
    </style:style>
    <style:style style:name="P15" style:family="paragraph" style:parent-style-name="Text_20_body" style:list-style-name="L13">
      <style:paragraph-properties fo:margin-top="0cm" fo:margin-bottom="0.423cm" fo:orphans="2" fo:widows="2"/>
      <style:text-properties fo:font-variant="normal" fo:text-transform="none" fo:color="#1f2328" fo:letter-spacing="normal"/>
    </style:style>
    <style:style style:name="P16" style:family="paragraph" style:parent-style-name="Text_20_body">
      <style:paragraph-properties fo:margin-top="0cm" fo:margin-bottom="0.423cm" fo:line-height="150%" fo:orphans="2" fo:widows="2"/>
    </style:style>
    <style:style style:name="P17" style:family="paragraph" style:parent-style-name="Text_20_body" style:list-style-name="L2">
      <style:paragraph-properties fo:margin-top="0cm" fo:margin-bottom="0.423cm" fo:line-height="150%" fo:orphans="2" fo:widows="2"/>
    </style:style>
    <style:style style:name="P18" style:family="paragraph" style:parent-style-name="Text_20_body" style:list-style-name="L3">
      <style:paragraph-properties fo:margin-top="0cm" fo:margin-bottom="0.423cm" fo:orphans="2" fo:widows="2"/>
    </style:style>
    <style:style style:name="P19" style:family="paragraph" style:parent-style-name="Text_20_body" style:list-style-name="L4">
      <style:paragraph-properties fo:margin-top="0cm" fo:margin-bottom="0.423cm" fo:orphans="2" fo:widows="2"/>
    </style:style>
    <style:style style:name="P20" style:family="paragraph" style:parent-style-name="Text_20_body" style:list-style-name="L5">
      <style:paragraph-properties fo:margin-top="0cm" fo:margin-bottom="0.423cm" fo:orphans="2" fo:widows="2"/>
    </style:style>
    <style:style style:name="P21" style:family="paragraph" style:parent-style-name="Text_20_body" style:list-style-name="L6">
      <style:paragraph-properties fo:margin-top="0cm" fo:margin-bottom="0.423cm" fo:orphans="2" fo:widows="2"/>
    </style:style>
    <style:style style:name="P22" style:family="paragraph" style:parent-style-name="Text_20_body" style:list-style-name="L7">
      <style:paragraph-properties fo:margin-top="0cm" fo:margin-bottom="0.423cm" fo:orphans="2" fo:widows="2"/>
    </style:style>
    <style:style style:name="P23" style:family="paragraph" style:parent-style-name="Text_20_body" style:list-style-name="L8">
      <style:paragraph-properties fo:margin-top="0cm" fo:margin-bottom="0.423cm" fo:orphans="2" fo:widows="2"/>
    </style:style>
    <style:style style:name="P24" style:family="paragraph" style:parent-style-name="Text_20_body" style:list-style-name="L9">
      <style:paragraph-properties fo:margin-top="0cm" fo:margin-bottom="0.423cm" fo:orphans="2" fo:widows="2"/>
    </style:style>
    <style:style style:name="P25" style:family="paragraph" style:parent-style-name="Text_20_body" style:list-style-name="L10">
      <style:paragraph-properties fo:margin-top="0cm" fo:margin-bottom="0.423cm" fo:orphans="2" fo:widows="2"/>
    </style:style>
    <style:style style:name="P26" style:family="paragraph" style:parent-style-name="Text_20_body">
      <style:paragraph-properties fo:margin-top="0cm" fo:margin-bottom="0cm" fo:line-height="150%" fo:orphans="2" fo:widows="2"/>
      <style:text-properties fo:font-variant="normal" fo:text-transform="none" fo:color="#1f2328" style:font-name="Mona Sans VF" fo:font-size="12pt" fo:letter-spacing="normal" fo:font-style="normal" fo:font-weight="normal"/>
    </style:style>
    <style:style style:name="P27" style:family="paragraph" style:parent-style-name="Text_20_body">
      <style:paragraph-properties fo:margin-top="0cm" fo:margin-bottom="0.212cm" fo:orphans="2" fo:widows="2" fo:padding="0cm" fo:border="none"/>
      <style:text-properties fo:font-variant="normal" fo:text-transform="none" fo:color="#1f2328" style:font-name="Mona Sans VF" fo:font-size="12pt" fo:letter-spacing="normal" fo:font-style="normal" fo:font-weight="bold"/>
    </style:style>
    <style:style style:name="P28" style:family="paragraph" style:parent-style-name="Heading_20_3">
      <style:paragraph-properties fo:margin-left="0cm" fo:margin-right="0cm" fo:margin-top="0cm" fo:margin-bottom="0.106cm" fo:line-height="150%" fo:orphans="2" fo:widows="2" fo:text-indent="0cm" style:auto-text-indent="false" fo:padding="0cm" fo:border="none"/>
      <style:text-properties fo:font-variant="normal" fo:text-transform="none" fo:color="#1f2328" style:font-name="Mona Sans VF" fo:font-size="10.5pt" fo:letter-spacing="normal" fo:font-style="normal" fo:font-weight="bold"/>
    </style:style>
    <style:style style:name="P29" style:family="paragraph" style:parent-style-name="Heading_20_3">
      <style:paragraph-properties fo:margin-left="0cm" fo:margin-right="0cm" fo:margin-top="0.635cm" fo:margin-bottom="0.423cm" fo:line-height="125%" fo:orphans="2" fo:widows="2" fo:text-indent="0cm" style:auto-text-indent="false"/>
    </style:style>
    <style:style style:name="P30" style:family="paragraph" style:parent-style-name="Heading_20_3">
      <style:paragraph-properties fo:margin-left="0cm" fo:margin-right="0cm" fo:margin-top="0.635cm" fo:margin-bottom="0.423cm" fo:line-height="125%" fo:orphans="2" fo:widows="2" fo:text-indent="0cm" style:auto-text-indent="false"/>
      <style:text-properties fo:font-variant="normal" fo:text-transform="none" fo:color="#1f2328" style:font-name="Mona Sans VF" fo:font-size="12pt" fo:letter-spacing="normal" fo:font-style="normal" fo:font-weight="bold"/>
    </style:style>
    <style:style style:name="P31" style:family="paragraph" style:parent-style-name="Horizontal_20_Line">
      <style:paragraph-properties fo:line-height="150%" fo:orphans="2" fo:widows="2"/>
    </style:style>
    <style:style style:name="P32" style:family="paragraph" style:parent-style-name="Heading_20_2">
      <style:paragraph-properties fo:margin-left="0cm" fo:margin-right="0cm" fo:margin-top="0.635cm" fo:margin-bottom="0.423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02cm solid #000000"/>
      <style:text-properties fo:font-variant="normal" fo:text-transform="none" fo:color="#1f2328" style:font-name="Mona Sans VF" fo:font-size="12pt" fo:letter-spacing="normal" fo:font-style="normal" fo:font-weight="bold"/>
    </style:style>
    <style:style style:name="P33" style:family="paragraph" style:parent-style-name="Heading_20_2">
      <style:paragraph-properties fo:margin-left="0cm" fo:margin-right="0cm" fo:margin-top="0.635cm" fo:margin-bottom="0.423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02cm solid #000000"/>
      <style:text-properties fo:font-variant="normal" fo:text-transform="none" fo:color="#1f2328" fo:letter-spacing="normal"/>
    </style:style>
    <style:style style:name="P34" style:family="paragraph" style:parent-style-name="Heading_20_1">
      <style:text-properties fo:font-variant="normal" fo:text-transform="none" fo:color="#1f2328" style:font-name="Mona Sans VF" fo:font-size="12pt" fo:letter-spacing="normal" fo:font-style="normal" fo:font-weight="bold"/>
    </style:style>
    <style:style style:name="T1" style:family="text">
      <style:text-properties style:font-name="Mona Sans VF" fo:font-size="12pt" fo:font-style="normal" fo:font-weight="normal"/>
    </style:style>
    <style:style style:name="T2" style:family="text">
      <style:text-properties style:font-name="Mona Sans VF" fo:font-size="12pt" fo:font-style="normal" fo:font-weight="bold"/>
    </style:style>
    <style:style style:name="T3" style:family="text">
      <style:text-properties style:font-name-asian="Mona Sans VF" style:font-size-asian="12pt" style:font-style-asian="normal" style:font-weight-asian="normal"/>
    </style:style>
    <style:style style:name="T4" style:family="text">
      <style:text-properties style:font-name-asian="Mona Sans VF" style:font-size-asian="12pt" style:font-style-asian="normal" style:font-weight-asian="bold"/>
    </style:style>
    <style:style style:name="T5" style:family="text">
      <style:text-properties fo:font-variant="normal" fo:text-transform="none" fo:color="#1f2328" style:font-name="Mona Sans VF" fo:font-size="12pt" fo:letter-spacing="normal" fo:font-style="normal" fo:font-weight="bold"/>
    </style:style>
    <style:style style:name="T6" style:family="text">
      <style:text-properties fo:font-variant="normal" fo:text-transform="none" fo:color="#1f2328" style:font-name="Mona Sans VF" fo:font-size="12pt" fo:letter-spacing="normal" fo:font-style="normal" fo:font-weight="normal"/>
    </style:style>
    <style:style style:name="T7" style:family="text">
      <style:text-properties fo:font-variant="normal" fo:text-transform="none" fo:color="#1f2328" fo:letter-spacing="normal"/>
    </style:style>
    <style:style style:name="T8" style:family="text">
      <style:text-properties fo:font-variant="normal" fo:text-transform="none" fo:color="#1f2328" fo:letter-spacing="normal" style:font-name-asian="Mona Sans VF" style:font-size-asian="12pt" style:font-style-asian="normal" style:font-weight-asian="normal"/>
    </style:style>
    <style:style style:name="T9" style:family="text">
      <style:text-properties fo:font-variant="normal" fo:text-transform="none" fo:color="#1f2328" style:font-name="Monaspace Neon" fo:font-size="9.75pt" fo:letter-spacing="normal" fo:font-style="normal" fo:font-weight="normal"/>
    </style:style>
    <style:style style:name="T10" style:family="text">
      <style:text-properties fo:font-variant="normal" fo:text-transform="none" fo:color="#0969da" style:font-name="Mona Sans VF" fo:font-size="12pt" fo:letter-spacing="normal" fo:font-style="normal" style:text-underline-style="solid" style:text-underline-width="auto" style:text-underline-color="font-color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user-content--welcome-to-my-github-profile" text:anchor-type="page" text:anchor-page-number="1" svg:x="-0.741cm" svg:y="1.191cm" svg:width="0.741cm" draw:z-index="2">
        <draw:text-box fo:min-height="0.741cm">
          <text:p text:style-name="Text_20_body"/>
        </draw:text-box>
      </draw:frame>
      <draw:frame draw:style-name="fr1" draw:name="user-content--about-me" text:anchor-type="page" text:anchor-page-number="1" svg:x="-0.741cm" svg:y="0.476cm" svg:width="0.741cm" draw:z-index="3">
        <draw:text-box fo:min-height="0.741cm">
          <text:p text:style-name="Text_20_body"/>
        </draw:text-box>
      </draw:frame>
      <draw:frame draw:style-name="fr1" draw:name="user-content--featured-projects" text:anchor-type="page" text:anchor-page-number="1" svg:x="-0.741cm" svg:y="0.476cm" svg:width="0.741cm" draw:z-index="4">
        <draw:text-box fo:min-height="0.741cm">
          <text:p text:style-name="Text_20_body"/>
        </draw:text-box>
      </draw:frame>
      <draw:frame draw:style-name="fr1" draw:name="user-content-kpgm---key-power-grail-mystery" text:anchor-type="page" text:anchor-page-number="1" svg:x="-0.741cm" svg:y="0.318cm" svg:width="0.741cm" draw:z-index="5">
        <draw:text-box fo:min-height="0.741cm">
          <text:p text:style-name="Text_20_body"/>
        </draw:text-box>
      </draw:frame>
      <draw:frame draw:style-name="fr1" draw:name="user-content-jkpgm" text:anchor-type="page" text:anchor-page-number="1" svg:x="-0.741cm" svg:y="0.318cm" svg:width="0.741cm" draw:z-index="6">
        <draw:text-box fo:min-height="0.741cm">
          <text:p text:style-name="Text_20_body"/>
        </draw:text-box>
      </draw:frame>
      <draw:frame draw:style-name="fr1" draw:name="user-content-xrptc" text:anchor-type="page" text:anchor-page-number="1" svg:x="-0.741cm" svg:y="0.318cm" svg:width="0.741cm" draw:z-index="7">
        <draw:text-box fo:min-height="0.741cm">
          <text:p text:style-name="Text_20_body"/>
        </draw:text-box>
      </draw:frame>
      <draw:frame draw:style-name="fr1" draw:name="user-content--connect-with-me" text:anchor-type="page" text:anchor-page-number="1" svg:x="-0.741cm" svg:y="0.476cm" svg:width="0.741cm" draw:z-index="8">
        <draw:text-box fo:min-height="0.741cm">
          <text:p text:style-name="Text_20_body"/>
        </draw:text-box>
      </draw:frame>
      <draw:frame draw:style-name="fr1" draw:name="user-content-social-networks" text:anchor-type="page" text:anchor-page-number="1" svg:x="-0.741cm" svg:y="0.318cm" svg:width="0.741cm" draw:z-index="9">
        <draw:text-box fo:min-height="0.741cm">
          <text:p text:style-name="Text_20_body"/>
        </draw:text-box>
      </draw:frame>
      <draw:frame draw:style-name="fr1" draw:name="user-content-professional-networks" text:anchor-type="page" text:anchor-page-number="1" svg:x="-0.741cm" svg:y="0.318cm" svg:width="0.741cm" draw:z-index="10">
        <draw:text-box fo:min-height="0.741cm">
          <text:p text:style-name="Text_20_body"/>
        </draw:text-box>
      </draw:frame>
      <draw:frame draw:style-name="fr1" draw:name="user-content-crypto-platforms" text:anchor-type="page" text:anchor-page-number="1" svg:x="-0.741cm" svg:y="0.318cm" svg:width="0.741cm" draw:z-index="11">
        <draw:text-box fo:min-height="0.741cm">
          <text:p text:style-name="Text_20_body"/>
        </draw:text-box>
      </draw:frame>
      <draw:frame draw:style-name="fr1" draw:name="user-content-️-skills--technologies" text:anchor-type="page" text:anchor-page-number="1" svg:x="-0.741cm" svg:y="0.476cm" svg:width="0.741cm" draw:z-index="12">
        <draw:text-box fo:min-height="0.741cm">
          <text:p text:style-name="Text_20_body"/>
        </draw:text-box>
      </draw:frame>
      <draw:frame draw:style-name="fr1" draw:name="user-content--github-statistics" text:anchor-type="page" text:anchor-page-number="1" svg:x="-0.741cm" svg:y="0.476cm" svg:width="0.741cm" draw:z-index="13">
        <draw:text-box fo:min-height="0.741cm">
          <text:p text:style-name="Text_20_body"/>
        </draw:text-box>
      </draw:frame>
      <draw:frame draw:style-name="fr1" draw:name="user-content--my-mission" text:anchor-type="page" text:anchor-page-number="1" svg:x="-0.741cm" svg:y="0.476cm" svg:width="0.741cm" draw:z-index="14">
        <draw:text-box fo:min-height="0.741cm">
          <text:p text:style-name="Text_20_body"/>
        </draw:text-box>
      </draw:frame>
      <draw:frame draw:style-name="fr1" draw:name="user-content--lets-collaborate" text:anchor-type="page" text:anchor-page-number="1" svg:x="-0.741cm" svg:y="0.476cm" svg:width="0.741cm" draw:z-index="15">
        <draw:text-box fo:min-height="0.741cm">
          <text:p text:style-name="Text_20_body"/>
        </draw:text-box>
      </draw:frame>
      <draw:frame draw:style-name="fr1" draw:name="user-content--support-my-work" text:anchor-type="page" text:anchor-page-number="1" svg:x="-0.741cm" svg:y="0.476cm" svg:width="0.741cm" draw:z-index="16">
        <draw:text-box fo:min-height="0.741cm">
          <text:p text:style-name="Text_20_body"/>
        </draw:text-box>
      </draw:frame>
      <text:p text:style-name="P1"><text:span text:style-name="T1">Чудово! Тепер у мене є все. Створю для вас професійний README з усіма деталями! ?</text:span><text:span text:style-name="T3">￐ﾧ</text:span><text:span text:style-name="T1">удово! ? Я створив для вас персоналізований README з усіма деталями:</text:span></text:p>
      <text:p text:style-name="P16"><text:span text:style-name="T7">✅ </text:span><text:span text:style-name="Strong_20_Emphasis"><text:span text:style-name="T5">Включено</text:span></text:span><text:span text:style-name="T6">:</text:span></text:p>
      <text:list xml:id="list4998043508626001332" text:style-name="L1">
        <text:list-item>
          <text:p text:style-name="P11">Ваша роль: Blockchain Developer &amp; Memtoken Creator</text:p>
        </text:list-item>
        <text:list-item>
          <text:p text:style-name="P11">Всі 3 токени (KPGM, JKPGM, XRPTC) з адресами</text:p>
        </text:list-item>
        <text:list-item>
          <text:p text:style-name="P11">Всі соціальні мережі та контакти</text:p>
        </text:list-item>
        <text:list-item>
          <text:p text:style-name="P11">CoinMarketCap і Gecko Terminal профілі</text:p>
        </text:list-item>
        <text:list-item>
          <text:p text:style-name="P11">GitHub статистика</text:p>
        </text:list-item>
        <text:list-item>
          <text:p text:style-name="P11">Секція про Web3 фокус і Solana</text:p>
        </text:list-item>
        <text:list-item>
          <text:p text:style-name="P11">Профайл на Raydium.io</text:p>
        </text:list-item>
      </text:list>
      <text:p text:style-name="P31"/>
      <text:p text:style-name="P16"><text:span text:style-name="Strong_20_Emphasis"><text:span text:style-name="T5">Щоб завантажити цей README на GitHub</text:span></text:span><text:span text:style-name="T6">, вам потрібно:</text:span></text:p>
      <text:list xml:id="list1697485377425972930" text:style-name="L2">
        <text:list-item>
          <text:p text:style-name="P17"><text:span text:style-name="Strong_20_Emphasis"><text:span text:style-name="T5">Перейти на</text:span></text:span><text:span text:style-name="T6"> </text:span><text:a xlink:type="simple" xlink:href="https://github.com/new" office:target-frame-name="_blank" xlink:show="new" text:style-name="Internet_20_link" text:visited-style-name="Visited_20_Internet_20_Link"><text:span text:style-name="T10">https://github.com/new</text:span></text:a></text:p>
        </text:list-item>
        <text:list-item>
          <text:p text:style-name="P5"><text:span text:style-name="Strong_20_Emphasis"><text:span text:style-name="T5">Створити новий public репозиторій</text:span></text:span><text:span text:style-name="T6"> з назвою </text:span><text:span text:style-name="Source_20_Text"><text:span text:style-name="T9">IosypDavyd</text:span></text:span><text:span text:style-name="T6"> (точно така ж, як ваше ім'я користувача)</text:span></text:p>
        </text:list-item>
        <text:list-item>
          <text:p text:style-name="P17"><text:span text:style-name="Strong_20_Emphasis"><text:span text:style-name="T5">Скопіювати весь текст</text:span></text:span><text:span text:style-name="T6"> README вище</text:span></text:p>
        </text:list-item>
        <text:list-item>
          <text:p text:style-name="P5"><text:span text:style-name="Strong_20_Emphasis"><text:span text:style-name="T5">Вставити</text:span></text:span><text:span text:style-name="T6"> в файл </text:span><text:span text:style-name="Source_20_Text"><text:span text:style-name="T9">README.md</text:span></text:span></text:p>
        </text:list-item>
        <text:list-item>
          <text:p text:style-name="P17"><text:span text:style-name="Strong_20_Emphasis"><text:span text:style-name="T5">Commit &amp; Push</text:span></text:span></text:p>
        </text:list-item>
      </text:list>
      <text:p text:style-name="P10">Після цього цей README автоматично з'явиться на вашому GitHub профілі! ?</text:p>
      <text:p text:style-name="P26">Потрібна допомога з чимось ще? ?</text:p>
      <text:h text:style-name="P28" text:outline-level="3">Make these code changes?</text:h>
      <text:p text:style-name="P27">README.md</text:p>
      <text:p text:style-name="Standard"/>
      <text:p text:style-name="Standard"/>
      <text:p text:style-name="Standard"><text:soft-page-break/># 👋 Welcome to My GitHub Profile</text:p>
      <text:p text:style-name="Standard"/>
      <text:p text:style-name="Standard">**Blockchain Developer &amp; Memtoken Creator** | Building on **Solana** with **Raydium.io**</text:p>
      <text:p text:style-name="Standard"/>
      <text:p text:style-name="Standard">---</text:p>
      <text:p text:style-name="Standard"/>
      <text:p text:style-name="Standard">## 🚀 About Me</text:p>
      <text:p text:style-name="Standard"/>
      <text:p text:style-name="Standard">I'm a blockchain developer and crypto enthusiast focused on creating innovative memtokens on the Solana network. I specialize in building projects using Raydium.io and fostering strong communities around Web3 initiatives.</text:p>
      <text:p text:style-name="Standard"/>
      <text:p text:style-name="Standard">- 🔗 **Blockchain Focus**: Solana Network &amp; DeFi Projects</text:p>
      <text:p text:style-name="Standard">- 💎 **Creator**: Multiple memtokens with active communities</text:p>
      <text:p text:style-name="Standard">- 🌱 **Builder**: Leveraging Raydium.io for token launches</text:p>
      <text:p text:style-name="Standard">- 🤝 **Community Focused**: Engaging across multiple platforms</text:p>
      <text:p text:style-name="Standard">- ✨ **Mission**: Creating valuable Web3 experiences</text:p>
      <text:p text:style-name="Standard"/>
      <text:p text:style-name="Standard">---</text:p>
      <text:p text:style-name="Standard"/>
      <text:p text:style-name="Standard">## 💎 Featured Projects</text:p>
      <text:p text:style-name="Standard"/>
      <text:p text:style-name="Standard">### **KPGM** - Key Power Grail Mystery</text:p>
      <text:p text:style-name="Standard">- **Token Address**: `EBRBXt79AyC2TVDLQAoBB6L7fgsctqS7DTevkwPuhray`</text:p>
      <text:p text:style-name="Standard">- **Platform**: Raydium.io</text:p>
      <text:p text:style-name="Standard">- **Status**: Active &amp; Growing Community</text:p>
      <text:p text:style-name="Standard">- **Description**: Strong community-driven memtoken on Solana</text:p>
      <text:p text:style-name="Standard"/>
      <text:p text:style-name="Standard">### **JKPGM**</text:p>
      <text:p text:style-name="Standard">- **Token Address**: `8bHmWm3vRUqfpXKszGnYyzLbwMtcN9bb7bZceUatEray`</text:p>
      <text:p text:style-name="Standard">- **Platform**: Raydium.io</text:p>
      <text:p text:style-name="Standard"/>
      <text:p text:style-name="Standard">### **XRPTC**</text:p>
      <text:p text:style-name="Standard">- **Token Address**: `D3a2hQhYJsaU7UUuJgjmDzLhSaohWP9PCmm6Umip8ray`</text:p>
      <text:p text:style-name="Standard">- **Platform**: Raydium.io</text:p>
      <text:p text:style-name="Standard"/>
      <text:p text:style-name="Standard">---</text:p>
      <text:p text:style-name="Standard"/>
      <text:p text:style-name="Standard">## 🔗 Connect With Me</text:p>
      <text:p text:style-name="Standard"/>
      <text:p text:style-name="Standard">### Social Networks</text:p>
      <text:p text:style-name="Standard">- 🐦 **X/Twitter**: [@KpgmSol](https://x.com/KpgmSol) | [@IosypDavyd1985](https://x.com/IosypDavyd1985) | [@SerafimCoin444](https://x.com/SerafimCoin444)</text:p>
      <text:p text:style-name="Standard">- 📱 **Telegram**: [KPGM_SOL](https://t.me/KPGM_SOL) | [Community Group](https://t.me/+q9VhY8ypidxiNjRk)</text:p>
      <text:p text:style-name="Standard">- 💬 **Discord**: [Join Server](https://discord.gg/2VWXC2az)</text:p>
      <text:p text:style-name="Standard">- 📺 **YouTube**: [@iosypdavyd_books](https://youtube.com/@iosypdavyd_books?si=2S6J8KFf6U_iLOD8)</text:p>
      <text:p text:style-name="Standard">- 🎬 **TikTok**: [@kpgm2026](https://tiktok.com/@kpgm2026)</text:p>
      <text:p text:style-name="Standard">- 📖 **Medium**: [@ruslanmatey](https://medium.com/@ruslanmatey)</text:p>
      <text:p text:style-name="Standard"/>
      <text:p text:style-name="Standard">### Professional Networks</text:p>
      <text:p text:style-name="Standard"><text:soft-page-break/>- 💼 **LinkedIn**: [Iosyp Davyd](https://www.linkedin.com/in/iosyp-davyd-01bbb82b4)</text:p>
      <text:p text:style-name="Standard">- 📘 **Facebook**: [Yosip David](https://www.facebook.com/yosip.david)</text:p>
      <text:p text:style-name="Standard">- 🖼️ **Instagram**: [@serafim4442025](https://www.instagram.com/serafim4442025)</text:p>
      <text:p text:style-name="Standard">- 🔍 **Reddit**: [Decent_Impression653](https://www.reddit.com/u/Decent_Impression653)</text:p>
      <text:p text:style-name="Standard"/>
      <text:p text:style-name="Standard">### Crypto Platforms</text:p>
      <text:p text:style-name="Standard">- 📊 **CoinMarketCap**: @User_hzov86453813</text:p>
      <text:p text:style-name="Standard">- 📈 **Gecko Terminal**: @User_hzov86453813</text:p>
      <text:p text:style-name="Standard"/>
      <text:p text:style-name="Standard">---</text:p>
      <text:p text:style-name="Standard"/>
      <text:p text:style-name="Standard">## 🛠️ Skills &amp; Technologies</text:p>
      <text:p text:style-name="Standard"/>
      <text:p text:style-name="Standard">- **Blockchain**: Solana, Smart Contracts</text:p>
      <text:p text:style-name="Standard">- **DeFi Platforms**: Raydium.io, SPL Tokens</text:p>
      <text:p text:style-name="Standard">- **Community Building**: Discord, Telegram, Social Media Management</text:p>
      <text:p text:style-name="Standard">- **Content Creation**: YouTube, TikTok, Medium, Twitter</text:p>
      <text:p text:style-name="Standard">- **Crypto Analytics**: CoinMarketCap, Gecko Terminal</text:p>
      <text:p text:style-name="Standard"/>
      <text:p text:style-name="Standard">---</text:p>
      <text:p text:style-name="Standard"/>
      <text:p text:style-name="Standard">## 📊 GitHub Statistics</text:p>
      <text:p text:style-name="Standard"/>
      <text:p text:style-name="Standard">![GitHub Stats](https://github-readme-stats.vercel.app/api?username=IosypDavyd&amp;show_icons=true&amp;theme=radical)</text:p>
      <text:p text:style-name="Standard"/>
      <text:p text:style-name="Standard">![Top Languages](https://github-readme-stats.vercel.app/api/top-langs/?username=IosypDavyd&amp;layout=compact&amp;theme=radical)</text:p>
      <text:p text:style-name="Standard"/>
      <text:p text:style-name="Standard">---</text:p>
      <text:p text:style-name="Standard"/>
      <text:p text:style-name="Standard">## 🎯 My Mission</text:p>
      <text:p text:style-name="Standard"/>
      <text:p text:style-name="Standard">Building sustainable Web3 projects with:</text:p>
      <text:p text:style-name="Standard">- ✅ Strong, engaged communities</text:p>
      <text:p text:style-name="Standard">- ✅ Transparent development practices</text:p>
      <text:p text:style-name="Standard">- ✅ Multi-platform presence &amp; engagement</text:p>
      <text:p text:style-name="Standard">- ✅ Innovative tokenomics on Solana</text:p>
      <text:p text:style-name="Standard"/>
      <text:p text:style-name="Standard">---</text:p>
      <text:p text:style-name="Standard"/>
      <text:p text:style-name="Standard">## 📈 Let's Collaborate</text:p>
      <text:p text:style-name="Standard"/>
      <text:p text:style-name="Standard">I'm always open to:</text:p>
      <text:p text:style-name="Standard">- 🤝 Collaborating on blockchain projects</text:p>
      <text:p text:style-name="Standard">- 💡 Discussing Web3 innovations</text:p>
      <text:p text:style-name="Standard">- 🚀 Building communities around shared interests</text:p>
      <text:p text:style-name="Standard">- 📡 Cross-platform partnerships</text:p>
      <text:p text:style-name="Standard"/>
      <text:p text:style-name="Standard">---</text:p>
      <text:p text:style-name="Standard"/>
      <text:p text:style-name="Standard">## ⭐ Support My Work</text:p>
      <text:p text:style-name="Standard"><text:soft-page-break/></text:p>
      <text:p text:style-name="Standard">If you find value in my projects:</text:p>
      <text:p text:style-name="Standard">- ⭐ Star my repositories</text:p>
      <text:p text:style-name="Standard">- 🔔 Follow on social media</text:p>
      <text:p text:style-name="Standard">- 💬 Join our community</text:p>
      <text:p text:style-name="Standard">- 🤝 Share feedback and ideas</text:p>
      <text:p text:style-name="Standard"/>
      <text:p text:style-name="Standard">---</text:p>
      <text:p text:style-name="Standard"/>
      <text:p text:style-name="Standard">**"Building the future of Web3, one token at a time."** 🚀✨</text:p>
      <text:p text:style-name="Standard"/>
      <text:p text:style-name="Standard">Last Updated: May 2026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ююююююююююююююююю</text:p>
      <text:p text:style-name="Standard"/>
      <text:p text:style-name="Standard"/>
      <text:p text:style-name="Standard"/>
      <text:p text:style-name="Standard"/>
      <text:h text:style-name="P34" text:outline-level="1">? Welcome to My GitHub Profile</text:h>
      <text:p text:style-name="P4"><text:span text:style-name="Strong_20_Emphasis"><text:span text:style-name="T5">Blockchain Developer &amp; Memtoken Creator</text:span></text:span><text:span text:style-name="T6"> | Building on </text:span><text:span text:style-name="Strong_20_Emphasis"><text:span text:style-name="T5">Solana</text:span></text:span><text:span text:style-name="T6"> with </text:span><text:span text:style-name="Strong_20_Emphasis"><text:span text:style-name="T5">Raydium.io</text:span></text:span></text:p>
      <text:p text:style-name="Horizontal_20_Line"/>
      <text:h text:style-name="P32" text:outline-level="2">? About Me</text:h>
      <text:p text:style-name="P2">I'm a blockchain developer and crypto enthusiast focused on creating innovative memtokens on the Solana network. I specialize in building projects using Raydium.io and fostering strong communities around Web3 initiatives.</text:p>
      <text:list xml:id="list2090008311635291425" text:style-name="L3">
        <text:list-item>
          <text:p text:style-name="P18"><text:span text:style-name="T6">? </text:span><text:span text:style-name="Strong_20_Emphasis"><text:span text:style-name="T5">Blockchain Focus</text:span></text:span><text:span text:style-name="T6">: Solana Network &amp; DeFi Projects</text:span></text:p>
        </text:list-item>
        <text:list-item>
          <text:p text:style-name="P18"><text:span text:style-name="T6">? </text:span><text:span text:style-name="Strong_20_Emphasis"><text:span text:style-name="T5">Creator</text:span></text:span><text:span text:style-name="T6">: Multiple memtokens with active communities</text:span></text:p>
        </text:list-item>
        <text:list-item>
          <text:p text:style-name="P18"><text:span text:style-name="T6">? </text:span><text:span text:style-name="Strong_20_Emphasis"><text:span text:style-name="T5">Builder</text:span></text:span><text:span text:style-name="T6">: Leveraging Raydium.io for token launches</text:span></text:p>
        </text:list-item>
        <text:list-item>
          <text:p text:style-name="P18"><text:span text:style-name="T6">? </text:span><text:span text:style-name="Strong_20_Emphasis"><text:span text:style-name="T5">Community Focused</text:span></text:span><text:span text:style-name="T6">: Engaging across multiple platforms</text:span></text:p>
        </text:list-item>
        <text:list-item>
          <text:p text:style-name="P18"><text:span text:style-name="T7">✨ </text:span><text:span text:style-name="Strong_20_Emphasis"><text:span text:style-name="T5">Mission</text:span></text:span><text:span text:style-name="T6">: Creating valuable Web3 experiences</text:span></text:p>
        </text:list-item>
      </text:list>
      <text:p text:style-name="Horizontal_20_Line"/>
      <text:h text:style-name="P32" text:outline-level="2"><text:soft-page-break/>? Featured Projects</text:h>
      <text:h text:style-name="P29" text:outline-level="3"><text:span text:style-name="Strong_20_Emphasis"><text:span text:style-name="T5">KPGM</text:span></text:span><text:span text:style-name="T5"> - Key Power Grail Mystery</text:span></text:h>
      <text:list xml:id="list3825397079239638917" text:style-name="L4">
        <text:list-item>
          <text:p text:style-name="P6"><text:span text:style-name="Strong_20_Emphasis"><text:span text:style-name="T5">Token Address</text:span></text:span><text:span text:style-name="T6">: </text:span><text:span text:style-name="Source_20_Text"><text:span text:style-name="T9">EBRBXt79AyC2TVDLQAoBB6L7fgsctqS7DTevkwPuhray</text:span></text:span></text:p>
        </text:list-item>
        <text:list-item>
          <text:p text:style-name="P19"><text:span text:style-name="Strong_20_Emphasis"><text:span text:style-name="T5">Platform</text:span></text:span><text:span text:style-name="T6">: Raydium.io</text:span></text:p>
        </text:list-item>
        <text:list-item>
          <text:p text:style-name="P19"><text:span text:style-name="Strong_20_Emphasis"><text:span text:style-name="T5">Status</text:span></text:span><text:span text:style-name="T6">: Active &amp; Growing Community</text:span></text:p>
        </text:list-item>
        <text:list-item>
          <text:p text:style-name="P19"><text:span text:style-name="Strong_20_Emphasis"><text:span text:style-name="T5">Description</text:span></text:span><text:span text:style-name="T6">: Strong community-driven memtoken on Solana</text:span></text:p>
        </text:list-item>
      </text:list>
      <text:h text:style-name="P29" text:outline-level="3"><text:span text:style-name="Strong_20_Emphasis"><text:span text:style-name="T5">JKPGM</text:span></text:span></text:h>
      <text:list xml:id="list5064642968308220069" text:style-name="L5">
        <text:list-item>
          <text:p text:style-name="P7"><text:span text:style-name="Strong_20_Emphasis"><text:span text:style-name="T5">Token Address</text:span></text:span><text:span text:style-name="T6">: </text:span><text:span text:style-name="Source_20_Text"><text:span text:style-name="T9">8bHmWm3vRUqfpXKszGnYyzLbwMtcN9bb7bZceUatEray</text:span></text:span></text:p>
        </text:list-item>
        <text:list-item>
          <text:p text:style-name="P20"><text:span text:style-name="Strong_20_Emphasis"><text:span text:style-name="T5">Platform</text:span></text:span><text:span text:style-name="T6">: Raydium.io</text:span></text:p>
        </text:list-item>
      </text:list>
      <text:h text:style-name="P29" text:outline-level="3"><text:span text:style-name="Strong_20_Emphasis"><text:span text:style-name="T5">XRPTC</text:span></text:span></text:h>
      <text:list xml:id="list3725613595954596457" text:style-name="L6">
        <text:list-item>
          <text:p text:style-name="P8"><text:span text:style-name="Strong_20_Emphasis"><text:span text:style-name="T5">Token Address</text:span></text:span><text:span text:style-name="T6">: </text:span><text:span text:style-name="Source_20_Text"><text:span text:style-name="T9">D3a2hQhYJsaU7UUuJgjmDzLhSaohWP9PCmm6Umip8ray</text:span></text:span></text:p>
        </text:list-item>
        <text:list-item>
          <text:p text:style-name="P21"><text:span text:style-name="Strong_20_Emphasis"><text:span text:style-name="T5">Platform</text:span></text:span><text:span text:style-name="T6">: Raydium.io</text:span></text:p>
        </text:list-item>
      </text:list>
      <text:p text:style-name="Horizontal_20_Line"/>
      <text:h text:style-name="P32" text:outline-level="2">? Connect With Me</text:h>
      <text:h text:style-name="P30" text:outline-level="3">Social Networks</text:h>
      <text:list xml:id="list6362161559675081489" text:style-name="L7">
        <text:list-item>
          <text:p text:style-name="P22"><text:span text:style-name="T6">? </text:span><text:span text:style-name="Strong_20_Emphasis"><text:span text:style-name="T5">X/Twitter</text:span></text:span><text:span text:style-name="T6">: </text:span><text:a xlink:type="simple" xlink:href="https://x.com/KpgmSol" text:style-name="Internet_20_link" text:visited-style-name="Visited_20_Internet_20_Link"><text:span text:style-name="T10">@KpgmSol</text:span></text:a><text:span text:style-name="T6"> | </text:span><text:a xlink:type="simple" xlink:href="https://x.com/IosypDavyd1985" text:style-name="Internet_20_link" text:visited-style-name="Visited_20_Internet_20_Link"><text:span text:style-name="T10">@IosypDavyd1985</text:span></text:a><text:span text:style-name="T6"> | </text:span><text:a xlink:type="simple" xlink:href="https://x.com/SerafimCoin444" text:style-name="Internet_20_link" text:visited-style-name="Visited_20_Internet_20_Link"><text:span text:style-name="T10">@SerafimCoin444</text:span></text:a></text:p>
        </text:list-item>
        <text:list-item>
          <text:p text:style-name="P22"><text:span text:style-name="T6">? </text:span><text:span text:style-name="Strong_20_Emphasis"><text:span text:style-name="T5">Telegram</text:span></text:span><text:span text:style-name="T6">: </text:span><text:a xlink:type="simple" xlink:href="https://t.me/KPGM_SOL" text:style-name="Internet_20_link" text:visited-style-name="Visited_20_Internet_20_Link"><text:span text:style-name="T10">KPGM_SOL</text:span></text:a><text:span text:style-name="T6"> | </text:span><text:a xlink:type="simple" xlink:href="https://t.me/+q9VhY8ypidxiNjRk" text:style-name="Internet_20_link" text:visited-style-name="Visited_20_Internet_20_Link"><text:span text:style-name="T10">Community Group</text:span></text:a></text:p>
        </text:list-item>
        <text:list-item>
          <text:p text:style-name="P22"><text:span text:style-name="T6">? </text:span><text:span text:style-name="Strong_20_Emphasis"><text:span text:style-name="T5">Discord</text:span></text:span><text:span text:style-name="T6">: </text:span><text:a xlink:type="simple" xlink:href="https://discord.gg/2VWXC2az" text:style-name="Internet_20_link" text:visited-style-name="Visited_20_Internet_20_Link"><text:span text:style-name="T10">Join Server</text:span></text:a></text:p>
        </text:list-item>
        <text:list-item>
          <text:p text:style-name="P22"><text:span text:style-name="T6">? </text:span><text:span text:style-name="Strong_20_Emphasis"><text:span text:style-name="T5">YouTube</text:span></text:span><text:span text:style-name="T6">: </text:span><text:a xlink:type="simple" xlink:href="https://youtube.com/@iosypdavyd_books?si=2S6J8KFf6U_iLOD8" text:style-name="Internet_20_link" text:visited-style-name="Visited_20_Internet_20_Link"><text:span text:style-name="T10">@iosypdavyd_books</text:span></text:a></text:p>
        </text:list-item>
        <text:list-item>
          <text:p text:style-name="P22"><text:span text:style-name="T6">? </text:span><text:span text:style-name="Strong_20_Emphasis"><text:span text:style-name="T5">TikTok</text:span></text:span><text:span text:style-name="T6">: </text:span><text:a xlink:type="simple" xlink:href="https://tiktok.com/@kpgm2026" text:style-name="Internet_20_link" text:visited-style-name="Visited_20_Internet_20_Link"><text:span text:style-name="T10">@kpgm2026</text:span></text:a></text:p>
        </text:list-item>
        <text:list-item>
          <text:p text:style-name="P22"><text:span text:style-name="T6">? </text:span><text:span text:style-name="Strong_20_Emphasis"><text:span text:style-name="T5">Medium</text:span></text:span><text:span text:style-name="T6">: </text:span><text:a xlink:type="simple" xlink:href="https://medium.com/@ruslanmatey" text:style-name="Internet_20_link" text:visited-style-name="Visited_20_Internet_20_Link"><text:span text:style-name="T10">@ruslanmatey</text:span></text:a></text:p>
        </text:list-item>
      </text:list>
      <text:h text:style-name="P30" text:outline-level="3">Professional Networks</text:h>
      <text:list xml:id="list4522427247708391902" text:style-name="L8">
        <text:list-item>
          <text:p text:style-name="P23"><text:span text:style-name="T6">? </text:span><text:span text:style-name="Strong_20_Emphasis"><text:span text:style-name="T5">LinkedIn</text:span></text:span><text:span text:style-name="T6">: </text:span><text:a xlink:type="simple" xlink:href="https://www.linkedin.com/in/iosyp-davyd-01bbb82b4" text:style-name="Internet_20_link" text:visited-style-name="Visited_20_Internet_20_Link"><text:span text:style-name="T10">Iosyp Davyd</text:span></text:a></text:p>
        </text:list-item>
        <text:list-item>
          <text:p text:style-name="P23"><text:soft-page-break/><text:span text:style-name="T6">? </text:span><text:span text:style-name="Strong_20_Emphasis"><text:span text:style-name="T5">Facebook</text:span></text:span><text:span text:style-name="T6">: </text:span><text:a xlink:type="simple" xlink:href="https://www.facebook.com/yosip.david" text:style-name="Internet_20_link" text:visited-style-name="Visited_20_Internet_20_Link"><text:span text:style-name="T10">Yosip David</text:span></text:a></text:p>
        </text:list-item>
        <text:list-item>
          <text:p text:style-name="P23"><text:span text:style-name="T6">?</text:span><text:span text:style-name="T8">￯ﾸﾏ </text:span><text:span text:style-name="Strong_20_Emphasis"><text:span text:style-name="T5">Instagram</text:span></text:span><text:span text:style-name="T6">: </text:span><text:a xlink:type="simple" xlink:href="https://www.instagram.com/serafim4442025" text:style-name="Internet_20_link" text:visited-style-name="Visited_20_Internet_20_Link"><text:span text:style-name="T10">@serafim4442025</text:span></text:a></text:p>
        </text:list-item>
        <text:list-item>
          <text:p text:style-name="P23"><text:span text:style-name="T6">? </text:span><text:span text:style-name="Strong_20_Emphasis"><text:span text:style-name="T5">Reddit</text:span></text:span><text:span text:style-name="T6">: </text:span><text:a xlink:type="simple" xlink:href="https://www.reddit.com/u/Decent_Impression653" text:style-name="Internet_20_link" text:visited-style-name="Visited_20_Internet_20_Link"><text:span text:style-name="T10">Decent_Impression653</text:span></text:a></text:p>
        </text:list-item>
      </text:list>
      <text:h text:style-name="P30" text:outline-level="3">Crypto Platforms</text:h>
      <text:list xml:id="list4504897349433199534" text:style-name="L9">
        <text:list-item>
          <text:p text:style-name="P24"><text:span text:style-name="T6">? </text:span><text:span text:style-name="Strong_20_Emphasis"><text:span text:style-name="T5">CoinMarketCap</text:span></text:span><text:span text:style-name="T6">: @User_hzov86453813</text:span></text:p>
        </text:list-item>
        <text:list-item>
          <text:p text:style-name="P24"><text:span text:style-name="T6">? </text:span><text:span text:style-name="Strong_20_Emphasis"><text:span text:style-name="T5">Gecko Terminal</text:span></text:span><text:span text:style-name="T6">: @User_hzov86453813</text:span></text:p>
        </text:list-item>
      </text:list>
      <text:p text:style-name="Horizontal_20_Line"/>
      <text:h text:style-name="P33" text:outline-level="2"><text:span text:style-name="T2">?</text:span><text:span text:style-name="T4">￯ﾸﾏ </text:span><text:span text:style-name="T2">Skills &amp; Technologies</text:span></text:h>
      <text:list xml:id="list3369576331376369174" text:style-name="L10">
        <text:list-item>
          <text:p text:style-name="P25"><text:span text:style-name="Strong_20_Emphasis"><text:span text:style-name="T5">Blockchain</text:span></text:span><text:span text:style-name="T6">: Solana, Smart Contracts</text:span></text:p>
        </text:list-item>
        <text:list-item>
          <text:p text:style-name="P25"><text:span text:style-name="Strong_20_Emphasis"><text:span text:style-name="T5">DeFi Platforms</text:span></text:span><text:span text:style-name="T6">: Raydium.io, SPL Tokens</text:span></text:p>
        </text:list-item>
        <text:list-item>
          <text:p text:style-name="P25"><text:span text:style-name="Strong_20_Emphasis"><text:span text:style-name="T5">Community Building</text:span></text:span><text:span text:style-name="T6">: Discord, Telegram, Social Media Management</text:span></text:p>
        </text:list-item>
        <text:list-item>
          <text:p text:style-name="P25"><text:span text:style-name="Strong_20_Emphasis"><text:span text:style-name="T5">Content Creation</text:span></text:span><text:span text:style-name="T6">: YouTube, TikTok, Medium, Twitter</text:span></text:p>
        </text:list-item>
        <text:list-item>
          <text:p text:style-name="P25"><text:span text:style-name="Strong_20_Emphasis"><text:span text:style-name="T5">Crypto Analytics</text:span></text:span><text:span text:style-name="T6">: CoinMarketCap, Gecko Terminal</text:span></text:p>
        </text:list-item>
      </text:list>
      <text:p text:style-name="Horizontal_20_Line"/>
      <text:h text:style-name="P32" text:outline-level="2">? GitHub Statistics</text:h>
      <text:p text:style-name="P3"><draw:a xlink:type="simple" xlink:href="https://camo.githubusercontent.com/0210f34a37256db644f2267aa5c64faf7288bfacb8d788518b5c87e1b34e89b3/68747470733a2f2f6769746875622d726561646d652d73746174732e76657263656c2e6170702f6170693f757365726e616d653d496f73797044617679642673686f775f69636f6e733d74727565267468656d653d7261646963616c" office:target-frame-name="_blank" xlink:show="new"><draw:frame draw:style-name="fr2" draw:name="graphics1" text:anchor-type="as-char" svg:width="2.067cm" svg:height="1.069cm" draw:z-index="0"><draw:image xlink:href="https://camo.githubusercontent.com/0210f34a37256db644f2267aa5c64faf7288bfacb8d788518b5c87e1b34e89b3/68747470733a2f2f6769746875622d726561646d652d73746174732e76657263656c2e6170702f6170693f757365726e616d653d496f73797044617679642673686f775f69636f6e733d74727565267468656d653d7261646963616c" xlink:type="simple" xlink:show="embed" xlink:actuate="onLoad"/><svg:title>GitHub Stats</svg:title></draw:frame></draw:a></text:p>
      <text:p text:style-name="P3"><draw:a xlink:type="simple" xlink:href="https://camo.githubusercontent.com/e7694e31f686881c28ff3caa5b110d966838aa049ff66590ee8a8716f8a25200/68747470733a2f2f6769746875622d726561646d652d73746174732e76657263656c2e6170702f6170692f746f702d6c616e67732f3f757365726e616d653d496f7379704461767964266c61796f75743d636f6d70616374267468656d653d7261646963616c" office:target-frame-name="_blank" xlink:show="new"><draw:frame draw:style-name="fr2" draw:name="graphics2" text:anchor-type="as-char" svg:width="2.067cm" svg:height="1.069cm" draw:z-index="1"><draw:image xlink:href="https://camo.githubusercontent.com/e7694e31f686881c28ff3caa5b110d966838aa049ff66590ee8a8716f8a25200/68747470733a2f2f6769746875622d726561646d652d73746174732e76657263656c2e6170702f6170692f746f702d6c616e67732f3f757365726e616d653d496f7379704461767964266c61796f75743d636f6d70616374267468656d653d7261646963616c" xlink:type="simple" xlink:show="embed" xlink:actuate="onLoad"/><svg:title>Top Languages</svg:title></draw:frame></draw:a></text:p>
      <text:p text:style-name="Horizontal_20_Line"/>
      <text:h text:style-name="P32" text:outline-level="2">? My Mission</text:h>
      <text:p text:style-name="P2">Building sustainable Web3 projects with:</text:p>
      <text:list xml:id="list160896291013553843" text:style-name="L11">
        <text:list-item>
          <text:p text:style-name="P14">✅ <text:span text:style-name="T1">Strong, engaged communities</text:span></text:p>
        </text:list-item>
        <text:list-item>
          <text:p text:style-name="P14">✅ <text:span text:style-name="T1">Transparent development practices</text:span></text:p>
        </text:list-item>
        <text:list-item>
          <text:p text:style-name="P14"><text:soft-page-break/>✅ <text:span text:style-name="T1">Multi-platform presence &amp; engagement</text:span></text:p>
        </text:list-item>
        <text:list-item>
          <text:p text:style-name="P14">✅ <text:span text:style-name="T1">Innovative tokenomics on Solana</text:span></text:p>
        </text:list-item>
      </text:list>
      <text:p text:style-name="Horizontal_20_Line"/>
      <text:h text:style-name="P32" text:outline-level="2">? Let's Collaborate</text:h>
      <text:p text:style-name="P2">I'm always open to:</text:p>
      <text:list xml:id="list4763417603638332334" text:style-name="L12">
        <text:list-item>
          <text:p text:style-name="P12">? Collaborating on blockchain projects</text:p>
        </text:list-item>
        <text:list-item>
          <text:p text:style-name="P12">? Discussing Web3 innovations</text:p>
        </text:list-item>
        <text:list-item>
          <text:p text:style-name="P12">? Building communities around shared interests</text:p>
        </text:list-item>
        <text:list-item>
          <text:p text:style-name="P12">? Cross-platform partnerships</text:p>
        </text:list-item>
      </text:list>
      <text:p text:style-name="Horizontal_20_Line"/>
      <text:h text:style-name="P33" text:outline-level="2">⭐ <text:span text:style-name="T2">Support My Work</text:span></text:h>
      <text:p text:style-name="P2">If you find value in my projects:</text:p>
      <text:list xml:id="list7409247234642986723" text:style-name="L13">
        <text:list-item>
          <text:p text:style-name="P15">⭐ <text:span text:style-name="T1">Star my repositories</text:span></text:p>
        </text:list-item>
        <text:list-item>
          <text:p text:style-name="P13">? Follow on social media</text:p>
        </text:list-item>
        <text:list-item>
          <text:p text:style-name="P13">? Join our community</text:p>
        </text:list-item>
        <text:list-item>
          <text:p text:style-name="P13">? Share feedback and ideas</text:p>
        </text:list-item>
      </text:list>
      <text:p text:style-name="Horizontal_20_Line"/>
      <text:p text:style-name="P4"><text:span text:style-name="Strong_20_Emphasis"><text:span text:style-name="T5">"Building the future of Web3, one token at a time."</text:span></text:span><text:span text:style-name="T6"> ?</text:span><text:span text:style-name="T8">￢ﾜﾨ</text:span></text:p>
      <text:p text:style-name="P9">Last Updated: May 2026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 Sans VF" svg:font-family="'Mona Sans VF', apple-system, BlinkMacSystemFont, 'Segoe UI', 'Noto Sans', Helvetica, Arial, sans-serif, 'Apple Color Emoji', 'Segoe UI Emoji'"/>
    <style:font-face style:name="Monaspace Neon" svg:font-family="'Monaspace Neon', ui-monospace, SFMono-Regular, 'SF Mono', Menlo, Consolas, 'Liberation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osyp davyd</meta:initial-creator>
    <meta:creation-date>2026-05-23T11:56:59.64</meta:creation-date>
    <meta:document-statistic meta:table-count="0" meta:image-count="2" meta:object-count="0" meta:page-count="7" meta:paragraph-count="161" meta:word-count="877" meta:character-count="6467"/>
    <dc:date>2026-05-23T12:24:27.59</dc:date>
    <dc:creator>iosyp davyd</dc:creator>
    <meta:editing-duration>PT12M17S</meta:editing-duration>
    <meta:editing-cycles>1</meta:editing-cycles>
    <meta:generator>OpenOffice/4.1.15$Win32 OpenOffice.org_project/4115m2$Build-9813</meta:generator>
  </office:meta>
</office:document-meta>
</file>