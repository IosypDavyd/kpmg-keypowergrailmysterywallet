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Я СОЗДАВ memtoken НА ПЛАТФОРМІ Raydium.io</text:p>
      <text:p text:style-name="Standard"/>
      <text:p text:style-name="Standard">KPGM <text:s text:c="2"/>EBRBXt79AyC2TVDLQAoBB6L7fgsctqS7DTevkwPuhray <text:s text:c="3"/></text:p>
      <text:p text:style-name="Standard"/>
      <text:p text:style-name="Standard">JKPGM <text:s text:c="2"/>8bHmWm3vRUqfpXKszGnYyzLbwMtcN9bb7bZceUatEray <text:s text:c="4"/></text:p>
      <text:p text:style-name="Standard"/>
      <text:p text:style-name="Standard">XRPTC <text:s text:c="3"/>D3a2hQhYJsaU7UUuJgjmDzLhSaohWP9PCmm6Umip8ray <text:s text:c="6"/></text:p>
      <text:p text:style-name="Standard"/>
      <text:p text:style-name="Standard">Соціальні сеті контакти :</text:p>
      <text:p text:style-name="Standard"/>
      <text:p text:style-name="Standard">https://x.com/KpgmSol</text:p>
      <text:p text:style-name="Standard"/>
      <text:p text:style-name="Standard">https://youtube.com/@iosypdavyd_books?si=2S6J8KFf6U_iLOD8</text:p>
      <text:p text:style-name="Standard"/>
      <text:p text:style-name="Standard">https://t.me/KPGM_SOL</text:p>
      <text:p text:style-name="Standard"/>
      <text:p text:style-name="Standard">https://t.me/+q9VhY8ypidxiNjRk</text:p>
      <text:p text:style-name="Standard"/>
      <text:p text:style-name="Standard">https://x.com/IosypDavyd1985</text:p>
      <text:p text:style-name="Standard"/>
      <text:p text:style-name="Standard">https://x.com/SerafimCoin444</text:p>
      <text:p text:style-name="Standard"/>
      <text:p text:style-name="Standard">https://www.facebook.com/yosip.david</text:p>
      <text:p text:style-name="Standard"/>
      <text:p text:style-name="Standard">https://medium.com/@ruslanmatey</text:p>
      <text:p text:style-name="Standard"/>
      <text:p text:style-name="Standard">https://www.reddit.com/u/Decent_Impression653/s/1sHe0KNDuK</text:p>
      <text:p text:style-name="Standard"/>
      <text:p text:style-name="Standard">https://www.instagram.com/serafim4442025?igsh=MXgxeDVoeWhlamwzeg==</text:p>
      <text:p text:style-name="Standard"/>
      <text:p text:style-name="Standard">https://www.facebook.com/yosip.david</text:p>
      <text:p text:style-name="Standard"/>
      <text:p text:style-name="Standard">https://discord.gg/2VWXC2az</text:p>
      <text:p text:style-name="Standard"/>
      <text:p text:style-name="Standard">https://github.com/IosypDavyd</text:p>
      <text:p text:style-name="Standard"/>
      <text:p text:style-name="Standard">CoinMarketCap</text:p>
      <text:p text:style-name="Standard">@User_hzov86453813</text:p>
      <text:p text:style-name="Standard"/>
      <text:p text:style-name="Standard">Gecko terminal</text:p>
      <text:p text:style-name="Standard">@User_hzov86453813</text:p>
      <text:p text:style-name="Standard"/>
      <text:p text:style-name="Standard">https://www.linkedin.com/in/iosyp-davyd-01bbb82b4?utm</text:p>
      <text:p text:style-name="Standard"/>
      <text:p text:style-name="Standard"><text:a xlink:href="mailto:tiktok.com/@kpgm2026" office:target-frame-name="_top" xlink:show="replace"><text:span text:style-name="Hyperlink">tiktok.com/@kpgm2026</text:span></text:a></text:p>
      <text:p text:style-name="P2"/>
      <text:p text:style-name="Standard"><text:span text:style-name="T3">https://www.facebook.com/profile.php?id=6159041406999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iosyp davyd</meta:initial-creator>
    <dc:creator>admini</dc:creator>
    <meta:creation-date>2026-05-23T11:54:00Z</meta:creation-date>
    <dc:date>2026-06-14T09:06:00Z</dc:date>
    <meta:template xlink:href="Normal.dotm" xlink:type="simple"/>
    <meta:editing-cycles>2</meta:editing-cycles>
    <meta:editing-duration>PT120S</meta:editing-duration>
    <meta:document-statistic meta:page-count="1" meta:paragraph-count="1" meta:word-count="628" meta:character-count="986" meta:row-count="2" meta:non-whitespace-character-count="359"/>
  </office:meta>
</office:document-meta>
</file>