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Mona Sans VF" svg:font-family="Mona Sans VF" style:font-family-generic="system"/>
    <style:font-face style:name="Monaspace Neon" svg:font-family="Monaspace Neon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3">
      <text:list-level-style-bullet text:level="1" text:style-name="WW_CharLFO3LVL1" text:bullet-char="•">
        <style:list-level-properties text:space-before="0.4909in" text:min-label-width="0in"/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4909in" text:min-label-width="0in"/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4909in" text:min-label-width="0in"/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4909in" text:min-label-width="0in"/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4909in" text:min-label-width="0in"/>
        <style:text-properties style:font-name="OpenSymbol"/>
      </text:list-level-style-bullet>
      <text:list-level-style-bullet text:level="2" text:style-name="WW_CharLFO7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7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7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7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7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7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7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7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4909in" text:min-label-width="0in"/>
        <style:text-properties style:font-name="OpenSymbol"/>
      </text:list-level-style-bullet>
      <text:list-level-style-bullet text:level="2" text:style-name="WW_CharLFO8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8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8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8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8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8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8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8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4909in" text:min-label-width="0in"/>
        <style:text-properties style:font-name="OpenSymbol"/>
      </text:list-level-style-bullet>
      <text:list-level-style-bullet text:level="2" text:style-name="WW_CharLFO9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9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9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9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9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9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9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9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4909in" text:min-label-width="0in"/>
        <style:text-properties style:font-name="OpenSymbol"/>
      </text:list-level-style-bullet>
      <text:list-level-style-bullet text:level="2" text:style-name="WW_CharLFO10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0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0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0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0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0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0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0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4909in" text:min-label-width="0in"/>
        <style:text-properties style:font-name="OpenSymbol"/>
      </text:list-level-style-bullet>
      <text:list-level-style-bullet text:level="2" text:style-name="WW_CharLFO11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1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1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1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1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1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1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1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4909in" text:min-label-width="0in"/>
        <style:text-properties style:font-name="OpenSymbol"/>
      </text:list-level-style-bullet>
      <text:list-level-style-bullet text:level="2" text:style-name="WW_CharLFO12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2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2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2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2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2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2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2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4909in" text:min-label-width="0in"/>
        <style:text-properties style:font-name="OpenSymbol"/>
      </text:list-level-style-bullet>
      <text:list-level-style-bullet text:level="2" text:style-name="WW_CharLFO13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3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3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3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3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3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3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3LVL9" text:bullet-char="•">
        <style:list-level-properties text:space-before="4.2222in" text:min-label-width="0.1965in"/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widows="2" fo:orphans="2" fo:break-before="page" fo:margin-bottom="0.1666in" fo:line-height="150%"/>
    </style:style>
    <style:style style:name="T2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T3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T4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T5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T6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T7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T8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T9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T10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T11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T12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T13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T14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T15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T16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T17" style:parent-style-name="DefaultParagraphFont" style:family="text">
      <style:text-properties style:font-name="Mona Sans VF" fo:font-weight="bold" style:font-weight-asian="bold" fo:color="#1F2328" fo:font-size="18pt" style:font-size-asian="18pt" style:font-size-complex="18pt"/>
    </style:style>
    <style:style style:name="T18" style:parent-style-name="DefaultParagraphFont" style:family="text">
      <style:text-properties style:font-name="Mona Sans VF" fo:font-weight="bold" style:font-weight-asian="bold" fo:color="#1F2328" fo:font-size="18pt" style:font-size-asian="18pt" style:font-size-complex="18pt"/>
    </style:style>
    <style:style style:name="P19" style:parent-style-name="Textbody" style:family="paragraph">
      <style:paragraph-properties fo:widows="2" fo:orphans="2" fo:margin-bottom="0.1666in" fo:line-height="150%"/>
    </style:style>
    <style:style style:name="T20" style:parent-style-name="DefaultParagraphFont" style:family="text">
      <style:text-properties fo:color="#1F2328"/>
    </style:style>
    <style:style style:name="T21" style:parent-style-name="DefaultParagraphFont" style:family="text">
      <style:text-properties fo:color="#1F2328"/>
    </style:style>
    <style:style style:name="T22" style:parent-style-name="StrongEmphasis" style:family="text">
      <style:text-properties style:font-name="Mona Sans VF" fo:color="#1F2328"/>
    </style:style>
    <style:style style:name="T23" style:parent-style-name="DefaultParagraphFont" style:family="text">
      <style:text-properties style:font-name="Mona Sans VF" fo:color="#1F2328"/>
    </style:style>
    <style:style style:name="P24" style:parent-style-name="Textbody" style:family="paragraph">
      <style:paragraph-properties fo:widows="2" fo:orphans="2" fo:margin-bottom="0.1666in" fo:line-height="150%"/>
      <style:text-properties style:font-name="Mona Sans VF" fo:color="#1F2328"/>
    </style:style>
    <style:style style:name="P25" style:parent-style-name="Textbody" style:family="paragraph">
      <style:paragraph-properties fo:widows="2" fo:orphans="2" fo:margin-bottom="0.1666in" fo:line-height="150%"/>
      <style:text-properties style:font-name="Mona Sans VF" fo:color="#1F2328"/>
    </style:style>
    <style:style style:name="P26" style:parent-style-name="Textbody" style:family="paragraph">
      <style:paragraph-properties fo:widows="2" fo:orphans="2" fo:margin-bottom="0.1666in" fo:line-height="150%"/>
      <style:text-properties style:font-name="Mona Sans VF" fo:color="#1F2328"/>
    </style:style>
    <style:style style:name="P27" style:parent-style-name="Textbody" style:family="paragraph">
      <style:paragraph-properties fo:widows="2" fo:orphans="2" fo:margin-bottom="0.1666in" fo:line-height="150%"/>
      <style:text-properties style:font-name="Mona Sans VF" fo:color="#1F2328"/>
    </style:style>
    <style:style style:name="P28" style:parent-style-name="Textbody" style:family="paragraph">
      <style:paragraph-properties fo:widows="2" fo:orphans="2" fo:margin-bottom="0.1666in" fo:line-height="150%"/>
      <style:text-properties style:font-name="Mona Sans VF" fo:color="#1F2328"/>
    </style:style>
    <style:style style:name="P29" style:parent-style-name="Textbody" style:family="paragraph">
      <style:paragraph-properties fo:widows="2" fo:orphans="2" fo:margin-bottom="0.1666in" fo:line-height="150%"/>
      <style:text-properties style:font-name="Mona Sans VF" fo:color="#1F2328"/>
    </style:style>
    <style:style style:name="P30" style:parent-style-name="Textbody" style:family="paragraph">
      <style:paragraph-properties fo:widows="2" fo:orphans="2" fo:margin-bottom="0.1666in" fo:line-height="150%"/>
      <style:text-properties style:font-name="Mona Sans VF" fo:color="#1F2328"/>
    </style:style>
    <style:style style:name="P31" style:parent-style-name="HorizontalLine" style:family="paragraph">
      <style:paragraph-properties fo:widows="2" fo:orphans="2" fo:line-height="150%"/>
    </style:style>
    <style:style style:name="P32" style:parent-style-name="Textbody" style:family="paragraph">
      <style:paragraph-properties fo:widows="2" fo:orphans="2" fo:margin-bottom="0.1666in" fo:line-height="150%"/>
    </style:style>
    <style:style style:name="T33" style:parent-style-name="StrongEmphasis" style:family="text">
      <style:text-properties style:font-name="Mona Sans VF" fo:color="#1F2328"/>
    </style:style>
    <style:style style:name="T34" style:parent-style-name="DefaultParagraphFont" style:family="text">
      <style:text-properties style:font-name="Mona Sans VF" fo:color="#1F2328"/>
    </style:style>
    <style:style style:name="P35" style:parent-style-name="Textbody" style:family="paragraph">
      <style:paragraph-properties fo:widows="2" fo:orphans="2" fo:margin-bottom="0.1666in" fo:line-height="150%"/>
    </style:style>
    <style:style style:name="T36" style:parent-style-name="StrongEmphasis" style:family="text">
      <style:text-properties style:font-name="Mona Sans VF" fo:color="#1F2328"/>
    </style:style>
    <style:style style:name="T37" style:parent-style-name="DefaultParagraphFont" style:family="text">
      <style:text-properties style:font-name="Mona Sans VF" fo:color="#1F2328"/>
    </style:style>
    <style:style style:name="T38" style:parent-style-name="DefaultParagraphFont" style:family="text">
      <style:text-properties style:font-name="Mona Sans VF" fo:color="#0969DA" style:text-underline-type="single" style:text-underline-style="solid" style:text-underline-width="auto" style:text-underline-mode="continuous"/>
    </style:style>
    <style:style style:name="P39" style:parent-style-name="Textbody" style:family="paragraph">
      <style:paragraph-properties fo:widows="2" fo:orphans="2" fo:margin-bottom="0in" fo:line-height="150%" fo:margin-left="0in" fo:text-indent="0in">
        <style:tab-stops/>
      </style:paragraph-properties>
    </style:style>
    <style:style style:name="T40" style:parent-style-name="StrongEmphasis" style:family="text">
      <style:text-properties style:font-name="Mona Sans VF" fo:color="#1F2328"/>
    </style:style>
    <style:style style:name="T41" style:parent-style-name="DefaultParagraphFont" style:family="text">
      <style:text-properties style:font-name="Mona Sans VF" fo:color="#1F2328"/>
    </style:style>
    <style:style style:name="T42" style:parent-style-name="SourceText" style:family="text">
      <style:text-properties style:font-name="Monaspace Neon" fo:color="#1F2328" fo:font-size="9.5pt" style:font-size-asian="9.5pt"/>
    </style:style>
    <style:style style:name="T43" style:parent-style-name="DefaultParagraphFont" style:family="text">
      <style:text-properties style:font-name="Mona Sans VF" fo:color="#1F2328"/>
    </style:style>
    <style:style style:name="P44" style:parent-style-name="Textbody" style:family="paragraph">
      <style:paragraph-properties fo:widows="2" fo:orphans="2" fo:margin-bottom="0.1666in" fo:line-height="150%"/>
    </style:style>
    <style:style style:name="T45" style:parent-style-name="StrongEmphasis" style:family="text">
      <style:text-properties style:font-name="Mona Sans VF" fo:color="#1F2328"/>
    </style:style>
    <style:style style:name="T46" style:parent-style-name="StrongEmphasis" style:family="text">
      <style:text-properties style:font-name="Mona Sans VF" fo:color="#1F2328"/>
    </style:style>
    <style:style style:name="T47" style:parent-style-name="DefaultParagraphFont" style:family="text">
      <style:text-properties style:font-name="Mona Sans VF" fo:color="#1F2328"/>
    </style:style>
    <style:style style:name="P48" style:parent-style-name="Textbody" style:family="paragraph">
      <style:paragraph-properties fo:widows="2" fo:orphans="2" fo:margin-bottom="0in" fo:line-height="150%" fo:margin-left="0in" fo:text-indent="0in">
        <style:tab-stops/>
      </style:paragraph-properties>
    </style:style>
    <style:style style:name="T49" style:parent-style-name="StrongEmphasis" style:family="text">
      <style:text-properties style:font-name="Mona Sans VF" fo:color="#1F2328"/>
    </style:style>
    <style:style style:name="T50" style:parent-style-name="DefaultParagraphFont" style:family="text">
      <style:text-properties style:font-name="Mona Sans VF" fo:color="#1F2328"/>
    </style:style>
    <style:style style:name="T51" style:parent-style-name="SourceText" style:family="text">
      <style:text-properties style:font-name="Monaspace Neon" fo:color="#1F2328" fo:font-size="9.5pt" style:font-size-asian="9.5pt"/>
    </style:style>
    <style:style style:name="P52" style:parent-style-name="Textbody" style:family="paragraph">
      <style:paragraph-properties fo:widows="2" fo:orphans="2" fo:margin-bottom="0.1666in" fo:line-height="150%"/>
    </style:style>
    <style:style style:name="T53" style:parent-style-name="StrongEmphasis" style:family="text">
      <style:text-properties style:font-name="Mona Sans VF" fo:color="#1F2328"/>
    </style:style>
    <style:style style:name="P54" style:parent-style-name="Textbody" style:family="paragraph">
      <style:paragraph-properties fo:widows="2" fo:orphans="2" fo:margin-bottom="0.1666in" fo:line-height="150%"/>
      <style:text-properties style:font-name="Mona Sans VF" fo:color="#1F2328"/>
    </style:style>
    <style:style style:name="P55" style:parent-style-name="Textbody" style:family="paragraph">
      <style:paragraph-properties fo:widows="2" fo:orphans="2" fo:margin-bottom="0in" fo:line-height="150%"/>
      <style:text-properties style:font-name="Mona Sans VF" fo:color="#1F2328"/>
    </style:style>
    <style:style style:name="P56" style:parent-style-name="Heading3" style:family="paragraph">
      <style:paragraph-properties fo:widows="2" fo:orphans="2" fo:margin-top="0in" fo:margin-bottom="0.0416in" fo:line-height="150%"/>
      <style:text-properties style:font-name="Mona Sans VF" fo:color="#1F2328" fo:font-size="10.5pt" style:font-size-asian="10.5pt"/>
    </style:style>
    <style:style style:name="P57" style:parent-style-name="Textbody" style:family="paragraph">
      <style:paragraph-properties fo:widows="2" fo:orphans="2"/>
      <style:text-properties style:font-name="Mona Sans VF" fo:font-weight="bold" style:font-weight-asian="bold" fo:color="#1F2328"/>
    </style:style>
    <style:style style:name="P58" style:parent-style-name="Heading1" style:family="paragraph">
      <style:text-properties style:font-name="Mona Sans VF" fo:color="#1F2328" fo:font-size="12pt" style:font-size-asian="12pt"/>
    </style:style>
    <style:style style:name="P59" style:parent-style-name="Textbody" style:family="paragraph">
      <style:paragraph-properties fo:widows="2" fo:orphans="2" fo:margin-bottom="0.1666in"/>
    </style:style>
    <style:style style:name="T60" style:parent-style-name="StrongEmphasis" style:family="text">
      <style:text-properties style:font-name="Mona Sans VF" fo:color="#1F2328"/>
    </style:style>
    <style:style style:name="T61" style:parent-style-name="StrongEmphasis" style:family="text">
      <style:text-properties style:font-name="Mona Sans VF" fo:color="#1F2328"/>
    </style:style>
    <style:style style:name="T62" style:parent-style-name="DefaultParagraphFont" style:family="text">
      <style:text-properties style:font-name="Mona Sans VF" fo:color="#1F2328"/>
    </style:style>
    <style:style style:name="T63" style:parent-style-name="StrongEmphasis" style:family="text">
      <style:text-properties style:font-name="Mona Sans VF" fo:color="#1F2328"/>
    </style:style>
    <style:style style:name="T64" style:parent-style-name="DefaultParagraphFont" style:family="text">
      <style:text-properties style:font-name="Mona Sans VF" fo:color="#1F2328"/>
    </style:style>
    <style:style style:name="T65" style:parent-style-name="StrongEmphasis" style:family="text">
      <style:text-properties style:font-name="Mona Sans VF" fo:color="#1F2328"/>
    </style:style>
    <style:style style:name="P66" style:parent-style-name="Heading2" style:family="paragraph">
      <style:paragraph-properties fo:widows="2" fo:orphans="2" fo:border-top="none" fo:border-left="none" fo:border-bottom="0.0034in solid #000000" fo:border-right="none" fo:padding="0in" style:shadow="none" fo:margin-top="0.25in" fo:margin-bottom="0.1666in" fo:line-height="125%"/>
      <style:text-properties style:font-name="Mona Sans VF" fo:color="#1F2328" fo:font-size="12pt" style:font-size-asian="12pt"/>
    </style:style>
    <style:style style:name="P67" style:parent-style-name="Textbody" style:family="paragraph">
      <style:paragraph-properties fo:widows="2" fo:orphans="2" fo:margin-bottom="0.1666in"/>
      <style:text-properties style:font-name="Mona Sans VF" fo:color="#1F2328"/>
    </style:style>
    <style:style style:name="P68" style:parent-style-name="Textbody" style:family="paragraph">
      <style:paragraph-properties fo:widows="2" fo:orphans="2" fo:margin-bottom="0.1666in"/>
    </style:style>
    <style:style style:name="T69" style:parent-style-name="DefaultParagraphFont" style:family="text">
      <style:text-properties style:font-name="Mona Sans VF" fo:color="#1F2328"/>
    </style:style>
    <style:style style:name="T70" style:parent-style-name="StrongEmphasis" style:family="text">
      <style:text-properties style:font-name="Mona Sans VF" fo:color="#1F2328"/>
    </style:style>
    <style:style style:name="T71" style:parent-style-name="DefaultParagraphFont" style:family="text">
      <style:text-properties style:font-name="Mona Sans VF" fo:color="#1F2328"/>
    </style:style>
    <style:style style:name="P72" style:parent-style-name="Textbody" style:family="paragraph">
      <style:paragraph-properties fo:widows="2" fo:orphans="2" fo:margin-bottom="0.1666in"/>
    </style:style>
    <style:style style:name="T73" style:parent-style-name="DefaultParagraphFont" style:family="text">
      <style:text-properties style:font-name="Mona Sans VF" fo:color="#1F2328"/>
    </style:style>
    <style:style style:name="T74" style:parent-style-name="StrongEmphasis" style:family="text">
      <style:text-properties style:font-name="Mona Sans VF" fo:color="#1F2328"/>
    </style:style>
    <style:style style:name="T75" style:parent-style-name="DefaultParagraphFont" style:family="text">
      <style:text-properties style:font-name="Mona Sans VF" fo:color="#1F2328"/>
    </style:style>
    <style:style style:name="P76" style:parent-style-name="Textbody" style:family="paragraph">
      <style:paragraph-properties fo:widows="2" fo:orphans="2" fo:margin-bottom="0.1666in"/>
    </style:style>
    <style:style style:name="T77" style:parent-style-name="DefaultParagraphFont" style:family="text">
      <style:text-properties style:font-name="Mona Sans VF" fo:color="#1F2328"/>
    </style:style>
    <style:style style:name="T78" style:parent-style-name="StrongEmphasis" style:family="text">
      <style:text-properties style:font-name="Mona Sans VF" fo:color="#1F2328"/>
    </style:style>
    <style:style style:name="T79" style:parent-style-name="DefaultParagraphFont" style:family="text">
      <style:text-properties style:font-name="Mona Sans VF" fo:color="#1F2328"/>
    </style:style>
    <style:style style:name="P80" style:parent-style-name="Textbody" style:family="paragraph">
      <style:paragraph-properties fo:widows="2" fo:orphans="2" fo:margin-bottom="0.1666in"/>
    </style:style>
    <style:style style:name="T81" style:parent-style-name="DefaultParagraphFont" style:family="text">
      <style:text-properties style:font-name="Mona Sans VF" fo:color="#1F2328"/>
    </style:style>
    <style:style style:name="T82" style:parent-style-name="StrongEmphasis" style:family="text">
      <style:text-properties style:font-name="Mona Sans VF" fo:color="#1F2328"/>
    </style:style>
    <style:style style:name="T83" style:parent-style-name="DefaultParagraphFont" style:family="text">
      <style:text-properties style:font-name="Mona Sans VF" fo:color="#1F2328"/>
    </style:style>
    <style:style style:name="P84" style:parent-style-name="Textbody" style:family="paragraph">
      <style:paragraph-properties fo:widows="2" fo:orphans="2" fo:margin-bottom="0.1666in"/>
    </style:style>
    <style:style style:name="T85" style:parent-style-name="DefaultParagraphFont" style:family="text">
      <style:text-properties fo:color="#1F2328"/>
    </style:style>
    <style:style style:name="T86" style:parent-style-name="DefaultParagraphFont" style:family="text">
      <style:text-properties fo:color="#1F2328"/>
    </style:style>
    <style:style style:name="T87" style:parent-style-name="StrongEmphasis" style:family="text">
      <style:text-properties style:font-name="Mona Sans VF" fo:color="#1F2328"/>
    </style:style>
    <style:style style:name="T88" style:parent-style-name="StrongEmphasis" style:family="text">
      <style:text-properties style:font-name="Mona Sans VF" fo:color="#1F2328"/>
    </style:style>
    <style:style style:name="T89" style:parent-style-name="DefaultParagraphFont" style:family="text">
      <style:text-properties style:font-name="Mona Sans VF" fo:color="#1F2328"/>
    </style:style>
    <style:style style:name="P90" style:parent-style-name="Heading2" style:family="paragraph">
      <style:paragraph-properties fo:widows="2" fo:orphans="2" fo:border-top="none" fo:border-left="none" fo:border-bottom="0.0034in solid #000000" fo:border-right="none" fo:padding="0in" style:shadow="none" fo:margin-top="0.25in" fo:margin-bottom="0.1666in" fo:line-height="125%"/>
      <style:text-properties style:font-name="Mona Sans VF" fo:color="#1F2328" fo:font-size="12pt" style:font-size-asian="12pt"/>
    </style:style>
    <style:style style:name="P91" style:parent-style-name="Heading3" style:family="paragraph">
      <style:paragraph-properties fo:widows="2" fo:orphans="2" fo:margin-top="0.25in" fo:margin-bottom="0.1666in" fo:line-height="125%"/>
    </style:style>
    <style:style style:name="T92" style:parent-style-name="StrongEmphasis" style:family="text">
      <style:text-properties style:font-name="Mona Sans VF" fo:color="#1F2328" fo:font-size="12pt" style:font-size-asian="12pt"/>
    </style:style>
    <style:style style:name="T93" style:parent-style-name="DefaultParagraphFont" style:family="text">
      <style:text-properties style:font-name="Mona Sans VF" fo:color="#1F2328" fo:font-size="12pt" style:font-size-asian="12pt"/>
    </style:style>
    <style:style style:name="P94" style:parent-style-name="Textbody" style:family="paragraph">
      <style:paragraph-properties fo:widows="2" fo:orphans="2" fo:margin-bottom="0in" fo:margin-left="0in">
        <style:tab-stops/>
      </style:paragraph-properties>
    </style:style>
    <style:style style:name="T95" style:parent-style-name="StrongEmphasis" style:family="text">
      <style:text-properties style:font-name="Mona Sans VF" fo:color="#1F2328"/>
    </style:style>
    <style:style style:name="T96" style:parent-style-name="DefaultParagraphFont" style:family="text">
      <style:text-properties style:font-name="Mona Sans VF" fo:color="#1F2328"/>
    </style:style>
    <style:style style:name="T97" style:parent-style-name="SourceText" style:family="text">
      <style:text-properties style:font-name="Monaspace Neon" fo:color="#1F2328" fo:font-size="9.5pt" style:font-size-asian="9.5pt"/>
    </style:style>
    <style:style style:name="P98" style:parent-style-name="Textbody" style:family="paragraph">
      <style:paragraph-properties fo:widows="2" fo:orphans="2" fo:margin-bottom="0.1666in"/>
    </style:style>
    <style:style style:name="T99" style:parent-style-name="StrongEmphasis" style:family="text">
      <style:text-properties style:font-name="Mona Sans VF" fo:color="#1F2328"/>
    </style:style>
    <style:style style:name="T100" style:parent-style-name="DefaultParagraphFont" style:family="text">
      <style:text-properties style:font-name="Mona Sans VF" fo:color="#1F2328"/>
    </style:style>
    <style:style style:name="P101" style:parent-style-name="Textbody" style:family="paragraph">
      <style:paragraph-properties fo:widows="2" fo:orphans="2" fo:margin-bottom="0.1666in"/>
    </style:style>
    <style:style style:name="T102" style:parent-style-name="StrongEmphasis" style:family="text">
      <style:text-properties style:font-name="Mona Sans VF" fo:color="#1F2328"/>
    </style:style>
    <style:style style:name="T103" style:parent-style-name="DefaultParagraphFont" style:family="text">
      <style:text-properties style:font-name="Mona Sans VF" fo:color="#1F2328"/>
    </style:style>
    <style:style style:name="P104" style:parent-style-name="Textbody" style:family="paragraph">
      <style:paragraph-properties fo:widows="2" fo:orphans="2" fo:margin-bottom="0.1666in"/>
    </style:style>
    <style:style style:name="T105" style:parent-style-name="StrongEmphasis" style:family="text">
      <style:text-properties style:font-name="Mona Sans VF" fo:color="#1F2328"/>
    </style:style>
    <style:style style:name="T106" style:parent-style-name="DefaultParagraphFont" style:family="text">
      <style:text-properties style:font-name="Mona Sans VF" fo:color="#1F2328"/>
    </style:style>
    <style:style style:name="T107" style:parent-style-name="DefaultParagraphFont" style:family="text">
      <style:text-properties style:font-name="Mona Sans VF" fo:color="#1F2328"/>
    </style:style>
    <style:style style:name="P108" style:parent-style-name="Heading3" style:family="paragraph">
      <style:paragraph-properties fo:widows="2" fo:orphans="2" fo:margin-top="0.25in" fo:margin-bottom="0.1666in" fo:line-height="125%"/>
    </style:style>
    <style:style style:name="T109" style:parent-style-name="StrongEmphasis" style:family="text">
      <style:text-properties style:font-name="Mona Sans VF" fo:color="#1F2328" fo:font-size="12pt" style:font-size-asian="12pt"/>
    </style:style>
    <style:style style:name="P110" style:parent-style-name="Textbody" style:family="paragraph">
      <style:paragraph-properties fo:widows="2" fo:orphans="2" fo:margin-bottom="0in" fo:margin-left="0in">
        <style:tab-stops/>
      </style:paragraph-properties>
    </style:style>
    <style:style style:name="T111" style:parent-style-name="StrongEmphasis" style:family="text">
      <style:text-properties style:font-name="Mona Sans VF" fo:color="#1F2328"/>
    </style:style>
    <style:style style:name="T112" style:parent-style-name="DefaultParagraphFont" style:family="text">
      <style:text-properties style:font-name="Mona Sans VF" fo:color="#1F2328"/>
    </style:style>
    <style:style style:name="T113" style:parent-style-name="SourceText" style:family="text">
      <style:text-properties style:font-name="Monaspace Neon" fo:color="#1F2328" fo:font-size="9.5pt" style:font-size-asian="9.5pt"/>
    </style:style>
    <style:style style:name="P114" style:parent-style-name="Textbody" style:family="paragraph">
      <style:paragraph-properties fo:widows="2" fo:orphans="2" fo:margin-bottom="0.1666in"/>
    </style:style>
    <style:style style:name="T115" style:parent-style-name="StrongEmphasis" style:family="text">
      <style:text-properties style:font-name="Mona Sans VF" fo:color="#1F2328"/>
    </style:style>
    <style:style style:name="T116" style:parent-style-name="DefaultParagraphFont" style:family="text">
      <style:text-properties style:font-name="Mona Sans VF" fo:color="#1F2328"/>
    </style:style>
    <style:style style:name="P117" style:parent-style-name="Heading3" style:family="paragraph">
      <style:paragraph-properties fo:widows="2" fo:orphans="2" fo:margin-top="0.25in" fo:margin-bottom="0.1666in" fo:line-height="125%"/>
    </style:style>
    <style:style style:name="T118" style:parent-style-name="StrongEmphasis" style:family="text">
      <style:text-properties style:font-name="Mona Sans VF" fo:color="#1F2328" fo:font-size="12pt" style:font-size-asian="12pt"/>
    </style:style>
    <style:style style:name="P119" style:parent-style-name="Textbody" style:family="paragraph">
      <style:paragraph-properties fo:widows="2" fo:orphans="2" fo:margin-bottom="0in" fo:margin-left="0in">
        <style:tab-stops/>
      </style:paragraph-properties>
    </style:style>
    <style:style style:name="T120" style:parent-style-name="StrongEmphasis" style:family="text">
      <style:text-properties style:font-name="Mona Sans VF" fo:color="#1F2328"/>
    </style:style>
    <style:style style:name="T121" style:parent-style-name="DefaultParagraphFont" style:family="text">
      <style:text-properties style:font-name="Mona Sans VF" fo:color="#1F2328"/>
    </style:style>
    <style:style style:name="T122" style:parent-style-name="SourceText" style:family="text">
      <style:text-properties style:font-name="Monaspace Neon" fo:color="#1F2328" fo:font-size="9.5pt" style:font-size-asian="9.5pt"/>
    </style:style>
    <style:style style:name="P123" style:parent-style-name="Textbody" style:family="paragraph">
      <style:paragraph-properties fo:widows="2" fo:orphans="2" fo:margin-bottom="0.1666in"/>
    </style:style>
    <style:style style:name="T124" style:parent-style-name="StrongEmphasis" style:family="text">
      <style:text-properties style:font-name="Mona Sans VF" fo:color="#1F2328"/>
    </style:style>
    <style:style style:name="T125" style:parent-style-name="DefaultParagraphFont" style:family="text">
      <style:text-properties style:font-name="Mona Sans VF" fo:color="#1F2328"/>
    </style:style>
    <style:style style:name="P126" style:parent-style-name="Heading2" style:family="paragraph">
      <style:paragraph-properties fo:widows="2" fo:orphans="2" fo:border-top="none" fo:border-left="none" fo:border-bottom="0.0034in solid #000000" fo:border-right="none" fo:padding="0in" style:shadow="none" fo:margin-top="0.25in" fo:margin-bottom="0.1666in" fo:line-height="125%"/>
      <style:text-properties style:font-name="Mona Sans VF" fo:color="#1F2328" fo:font-size="12pt" style:font-size-asian="12pt"/>
    </style:style>
    <style:style style:name="P127" style:parent-style-name="Heading3" style:family="paragraph">
      <style:paragraph-properties fo:widows="2" fo:orphans="2" fo:margin-top="0.25in" fo:margin-bottom="0.1666in" fo:line-height="125%"/>
      <style:text-properties style:font-name="Mona Sans VF" fo:color="#1F2328" fo:font-size="12pt" style:font-size-asian="12pt"/>
    </style:style>
    <style:style style:name="P128" style:parent-style-name="Textbody" style:family="paragraph">
      <style:paragraph-properties fo:widows="2" fo:orphans="2" fo:margin-bottom="0.1666in"/>
    </style:style>
    <style:style style:name="T129" style:parent-style-name="DefaultParagraphFont" style:family="text">
      <style:text-properties style:font-name="Mona Sans VF" fo:color="#1F2328"/>
    </style:style>
    <style:style style:name="T130" style:parent-style-name="StrongEmphasis" style:family="text">
      <style:text-properties style:font-name="Mona Sans VF" fo:color="#1F2328"/>
    </style:style>
    <style:style style:name="T131" style:parent-style-name="DefaultParagraphFont" style:family="text">
      <style:text-properties style:font-name="Mona Sans VF" fo:color="#1F2328"/>
    </style:style>
    <style:style style:name="T132" style:parent-style-name="DefaultParagraphFont" style:family="text">
      <style:text-properties style:font-name="Mona Sans VF" fo:color="#0969DA" style:text-underline-type="single" style:text-underline-style="solid" style:text-underline-width="auto" style:text-underline-mode="continuous"/>
    </style:style>
    <style:style style:name="T133" style:parent-style-name="DefaultParagraphFont" style:family="text">
      <style:text-properties style:font-name="Mona Sans VF" fo:color="#1F2328"/>
    </style:style>
    <style:style style:name="T134" style:parent-style-name="DefaultParagraphFont" style:family="text">
      <style:text-properties style:font-name="Mona Sans VF" fo:color="#0969DA" style:text-underline-type="single" style:text-underline-style="solid" style:text-underline-width="auto" style:text-underline-mode="continuous"/>
    </style:style>
    <style:style style:name="T135" style:parent-style-name="DefaultParagraphFont" style:family="text">
      <style:text-properties style:font-name="Mona Sans VF" fo:color="#1F2328"/>
    </style:style>
    <style:style style:name="T136" style:parent-style-name="DefaultParagraphFont" style:family="text">
      <style:text-properties style:font-name="Mona Sans VF" fo:color="#0969DA" style:text-underline-type="single" style:text-underline-style="solid" style:text-underline-width="auto" style:text-underline-mode="continuous"/>
    </style:style>
    <style:style style:name="P137" style:parent-style-name="Textbody" style:family="paragraph">
      <style:paragraph-properties fo:widows="2" fo:orphans="2" fo:margin-bottom="0.1666in"/>
    </style:style>
    <style:style style:name="T138" style:parent-style-name="DefaultParagraphFont" style:family="text">
      <style:text-properties style:font-name="Mona Sans VF" fo:color="#1F2328"/>
    </style:style>
    <style:style style:name="T139" style:parent-style-name="StrongEmphasis" style:family="text">
      <style:text-properties style:font-name="Mona Sans VF" fo:color="#1F2328"/>
    </style:style>
    <style:style style:name="T140" style:parent-style-name="DefaultParagraphFont" style:family="text">
      <style:text-properties style:font-name="Mona Sans VF" fo:color="#1F2328"/>
    </style:style>
    <style:style style:name="T141" style:parent-style-name="DefaultParagraphFont" style:family="text">
      <style:text-properties style:font-name="Mona Sans VF" fo:color="#0969DA" style:text-underline-type="single" style:text-underline-style="solid" style:text-underline-width="auto" style:text-underline-mode="continuous"/>
    </style:style>
    <style:style style:name="T142" style:parent-style-name="DefaultParagraphFont" style:family="text">
      <style:text-properties style:font-name="Mona Sans VF" fo:color="#1F2328"/>
    </style:style>
    <style:style style:name="T143" style:parent-style-name="DefaultParagraphFont" style:family="text">
      <style:text-properties style:font-name="Mona Sans VF" fo:color="#0969DA" style:text-underline-type="single" style:text-underline-style="solid" style:text-underline-width="auto" style:text-underline-mode="continuous"/>
    </style:style>
    <style:style style:name="P144" style:parent-style-name="Textbody" style:family="paragraph">
      <style:paragraph-properties fo:widows="2" fo:orphans="2" fo:margin-bottom="0.1666in"/>
    </style:style>
    <style:style style:name="T145" style:parent-style-name="DefaultParagraphFont" style:family="text">
      <style:text-properties style:font-name="Mona Sans VF" fo:color="#1F2328"/>
    </style:style>
    <style:style style:name="T146" style:parent-style-name="StrongEmphasis" style:family="text">
      <style:text-properties style:font-name="Mona Sans VF" fo:color="#1F2328"/>
    </style:style>
    <style:style style:name="T147" style:parent-style-name="DefaultParagraphFont" style:family="text">
      <style:text-properties style:font-name="Mona Sans VF" fo:color="#1F2328"/>
    </style:style>
    <style:style style:name="T148" style:parent-style-name="DefaultParagraphFont" style:family="text">
      <style:text-properties style:font-name="Mona Sans VF" fo:color="#0969DA" style:text-underline-type="single" style:text-underline-style="solid" style:text-underline-width="auto" style:text-underline-mode="continuous"/>
    </style:style>
    <style:style style:name="P149" style:parent-style-name="Textbody" style:family="paragraph">
      <style:paragraph-properties fo:widows="2" fo:orphans="2" fo:margin-bottom="0.1666in"/>
    </style:style>
    <style:style style:name="T150" style:parent-style-name="DefaultParagraphFont" style:family="text">
      <style:text-properties style:font-name="Mona Sans VF" fo:color="#1F2328"/>
    </style:style>
    <style:style style:name="T151" style:parent-style-name="StrongEmphasis" style:family="text">
      <style:text-properties style:font-name="Mona Sans VF" fo:color="#1F2328"/>
    </style:style>
    <style:style style:name="T152" style:parent-style-name="DefaultParagraphFont" style:family="text">
      <style:text-properties style:font-name="Mona Sans VF" fo:color="#1F2328"/>
    </style:style>
    <style:style style:name="T153" style:parent-style-name="DefaultParagraphFont" style:family="text">
      <style:text-properties style:font-name="Mona Sans VF" fo:color="#0969DA" style:text-underline-type="single" style:text-underline-style="solid" style:text-underline-width="auto" style:text-underline-mode="continuous"/>
    </style:style>
    <style:style style:name="P154" style:parent-style-name="Textbody" style:family="paragraph">
      <style:paragraph-properties fo:widows="2" fo:orphans="2" fo:margin-bottom="0.1666in"/>
    </style:style>
    <style:style style:name="T155" style:parent-style-name="DefaultParagraphFont" style:family="text">
      <style:text-properties style:font-name="Mona Sans VF" fo:color="#1F2328"/>
    </style:style>
    <style:style style:name="T156" style:parent-style-name="StrongEmphasis" style:family="text">
      <style:text-properties style:font-name="Mona Sans VF" fo:color="#1F2328"/>
    </style:style>
    <style:style style:name="T157" style:parent-style-name="DefaultParagraphFont" style:family="text">
      <style:text-properties style:font-name="Mona Sans VF" fo:color="#1F2328"/>
    </style:style>
    <style:style style:name="T158" style:parent-style-name="DefaultParagraphFont" style:family="text">
      <style:text-properties style:font-name="Mona Sans VF" fo:color="#0969DA" style:text-underline-type="single" style:text-underline-style="solid" style:text-underline-width="auto" style:text-underline-mode="continuous"/>
    </style:style>
    <style:style style:name="P159" style:parent-style-name="Textbody" style:family="paragraph">
      <style:paragraph-properties fo:widows="2" fo:orphans="2" fo:margin-bottom="0.1666in"/>
    </style:style>
    <style:style style:name="T160" style:parent-style-name="DefaultParagraphFont" style:family="text">
      <style:text-properties style:font-name="Mona Sans VF" fo:color="#1F2328"/>
    </style:style>
    <style:style style:name="T161" style:parent-style-name="StrongEmphasis" style:family="text">
      <style:text-properties style:font-name="Mona Sans VF" fo:color="#1F2328"/>
    </style:style>
    <style:style style:name="T162" style:parent-style-name="DefaultParagraphFont" style:family="text">
      <style:text-properties style:font-name="Mona Sans VF" fo:color="#1F2328"/>
    </style:style>
    <style:style style:name="T163" style:parent-style-name="DefaultParagraphFont" style:family="text">
      <style:text-properties style:font-name="Mona Sans VF" fo:color="#0969DA" style:text-underline-type="single" style:text-underline-style="solid" style:text-underline-width="auto" style:text-underline-mode="continuous"/>
    </style:style>
    <style:style style:name="P164" style:parent-style-name="Heading3" style:family="paragraph">
      <style:paragraph-properties fo:widows="2" fo:orphans="2" fo:margin-top="0.25in" fo:margin-bottom="0.1666in" fo:line-height="125%"/>
      <style:text-properties style:font-name="Mona Sans VF" fo:color="#1F2328" fo:font-size="12pt" style:font-size-asian="12pt"/>
    </style:style>
    <style:style style:name="P165" style:parent-style-name="Textbody" style:family="paragraph">
      <style:paragraph-properties fo:widows="2" fo:orphans="2" fo:margin-bottom="0.1666in"/>
    </style:style>
    <style:style style:name="T166" style:parent-style-name="DefaultParagraphFont" style:family="text">
      <style:text-properties style:font-name="Mona Sans VF" fo:color="#1F2328"/>
    </style:style>
    <style:style style:name="T167" style:parent-style-name="StrongEmphasis" style:family="text">
      <style:text-properties style:font-name="Mona Sans VF" fo:color="#1F2328"/>
    </style:style>
    <style:style style:name="T168" style:parent-style-name="DefaultParagraphFont" style:family="text">
      <style:text-properties style:font-name="Mona Sans VF" fo:color="#1F2328"/>
    </style:style>
    <style:style style:name="T169" style:parent-style-name="DefaultParagraphFont" style:family="text">
      <style:text-properties style:font-name="Mona Sans VF" fo:color="#0969DA" style:text-underline-type="single" style:text-underline-style="solid" style:text-underline-width="auto" style:text-underline-mode="continuous"/>
    </style:style>
    <style:style style:name="P170" style:parent-style-name="Textbody" style:family="paragraph">
      <style:paragraph-properties fo:widows="2" fo:orphans="2" fo:margin-bottom="0.1666in"/>
    </style:style>
    <style:style style:name="T171" style:parent-style-name="DefaultParagraphFont" style:family="text">
      <style:text-properties style:font-name="Mona Sans VF" fo:color="#1F2328"/>
    </style:style>
    <style:style style:name="T172" style:parent-style-name="StrongEmphasis" style:family="text">
      <style:text-properties style:font-name="Mona Sans VF" fo:color="#1F2328"/>
    </style:style>
    <style:style style:name="T173" style:parent-style-name="DefaultParagraphFont" style:family="text">
      <style:text-properties style:font-name="Mona Sans VF" fo:color="#1F2328"/>
    </style:style>
    <style:style style:name="T174" style:parent-style-name="DefaultParagraphFont" style:family="text">
      <style:text-properties style:font-name="Mona Sans VF" fo:color="#0969DA" style:text-underline-type="single" style:text-underline-style="solid" style:text-underline-width="auto" style:text-underline-mode="continuous"/>
    </style:style>
    <style:style style:name="P175" style:parent-style-name="Textbody" style:family="paragraph">
      <style:paragraph-properties fo:widows="2" fo:orphans="2" fo:margin-bottom="0.1666in"/>
    </style:style>
    <style:style style:name="T176" style:parent-style-name="DefaultParagraphFont" style:family="text">
      <style:text-properties style:font-name="Mona Sans VF" fo:color="#1F2328"/>
    </style:style>
    <style:style style:name="T177" style:parent-style-name="DefaultParagraphFont" style:family="text">
      <style:text-properties style:font-name-asian="Mona Sans VF" fo:color="#1F2328"/>
    </style:style>
    <style:style style:name="T178" style:parent-style-name="DefaultParagraphFont" style:family="text">
      <style:text-properties style:font-name-asian="Mona Sans VF" fo:color="#1F2328"/>
    </style:style>
    <style:style style:name="T179" style:parent-style-name="StrongEmphasis" style:family="text">
      <style:text-properties style:font-name="Mona Sans VF" fo:color="#1F2328"/>
    </style:style>
    <style:style style:name="T180" style:parent-style-name="DefaultParagraphFont" style:family="text">
      <style:text-properties style:font-name="Mona Sans VF" fo:color="#1F2328"/>
    </style:style>
    <style:style style:name="T181" style:parent-style-name="DefaultParagraphFont" style:family="text">
      <style:text-properties style:font-name="Mona Sans VF" fo:color="#0969DA" style:text-underline-type="single" style:text-underline-style="solid" style:text-underline-width="auto" style:text-underline-mode="continuous"/>
    </style:style>
    <style:style style:name="P182" style:parent-style-name="Textbody" style:family="paragraph">
      <style:paragraph-properties fo:widows="2" fo:orphans="2" fo:margin-bottom="0.1666in"/>
    </style:style>
    <style:style style:name="T183" style:parent-style-name="DefaultParagraphFont" style:family="text">
      <style:text-properties style:font-name="Mona Sans VF" fo:color="#1F2328"/>
    </style:style>
    <style:style style:name="T184" style:parent-style-name="StrongEmphasis" style:family="text">
      <style:text-properties style:font-name="Mona Sans VF" fo:color="#1F2328"/>
    </style:style>
    <style:style style:name="T185" style:parent-style-name="DefaultParagraphFont" style:family="text">
      <style:text-properties style:font-name="Mona Sans VF" fo:color="#1F2328"/>
    </style:style>
    <style:style style:name="T186" style:parent-style-name="DefaultParagraphFont" style:family="text">
      <style:text-properties style:font-name="Mona Sans VF" fo:color="#0969DA" style:text-underline-type="single" style:text-underline-style="solid" style:text-underline-width="auto" style:text-underline-mode="continuous"/>
    </style:style>
    <style:style style:name="P187" style:parent-style-name="Heading3" style:family="paragraph">
      <style:paragraph-properties fo:widows="2" fo:orphans="2" fo:margin-top="0.25in" fo:margin-bottom="0.1666in" fo:line-height="125%"/>
      <style:text-properties style:font-name="Mona Sans VF" fo:color="#1F2328" fo:font-size="12pt" style:font-size-asian="12pt"/>
    </style:style>
    <style:style style:name="P188" style:parent-style-name="Textbody" style:family="paragraph">
      <style:paragraph-properties fo:widows="2" fo:orphans="2" fo:margin-bottom="0.1666in"/>
    </style:style>
    <style:style style:name="T189" style:parent-style-name="DefaultParagraphFont" style:family="text">
      <style:text-properties style:font-name="Mona Sans VF" fo:color="#1F2328"/>
    </style:style>
    <style:style style:name="T190" style:parent-style-name="StrongEmphasis" style:family="text">
      <style:text-properties style:font-name="Mona Sans VF" fo:color="#1F2328"/>
    </style:style>
    <style:style style:name="T191" style:parent-style-name="DefaultParagraphFont" style:family="text">
      <style:text-properties style:font-name="Mona Sans VF" fo:color="#1F2328"/>
    </style:style>
    <style:style style:name="P192" style:parent-style-name="Textbody" style:family="paragraph">
      <style:paragraph-properties fo:widows="2" fo:orphans="2" fo:margin-bottom="0.1666in"/>
    </style:style>
    <style:style style:name="T193" style:parent-style-name="DefaultParagraphFont" style:family="text">
      <style:text-properties style:font-name="Mona Sans VF" fo:color="#1F2328"/>
    </style:style>
    <style:style style:name="T194" style:parent-style-name="StrongEmphasis" style:family="text">
      <style:text-properties style:font-name="Mona Sans VF" fo:color="#1F2328"/>
    </style:style>
    <style:style style:name="T195" style:parent-style-name="DefaultParagraphFont" style:family="text">
      <style:text-properties style:font-name="Mona Sans VF" fo:color="#1F2328"/>
    </style:style>
    <style:style style:name="P196" style:parent-style-name="Heading2" style:family="paragraph">
      <style:paragraph-properties fo:widows="2" fo:orphans="2" fo:border-top="none" fo:border-left="none" fo:border-bottom="0.0034in solid #000000" fo:border-right="none" fo:padding="0in" style:shadow="none" fo:margin-top="0.25in" fo:margin-bottom="0.1666in" fo:line-height="125%"/>
    </style:style>
    <style:style style:name="T197" style:parent-style-name="DefaultParagraphFont" style:family="text">
      <style:text-properties style:font-name="Mona Sans VF" fo:color="#1F2328" fo:font-size="12pt" style:font-size-asian="12pt"/>
    </style:style>
    <style:style style:name="T198" style:parent-style-name="DefaultParagraphFont" style:family="text">
      <style:text-properties style:font-name-asian="Mona Sans VF" fo:color="#1F2328" fo:font-size="12pt" style:font-size-asian="12pt"/>
    </style:style>
    <style:style style:name="T199" style:parent-style-name="DefaultParagraphFont" style:family="text">
      <style:text-properties style:font-name-asian="Mona Sans VF" fo:color="#1F2328" fo:font-size="12pt" style:font-size-asian="12pt"/>
    </style:style>
    <style:style style:name="T200" style:parent-style-name="DefaultParagraphFont" style:family="text">
      <style:text-properties style:font-name="Mona Sans VF" fo:color="#1F2328" fo:font-size="12pt" style:font-size-asian="12pt"/>
    </style:style>
    <style:style style:name="T201" style:parent-style-name="DefaultParagraphFont" style:family="text">
      <style:text-properties style:font-name="Mona Sans VF" fo:color="#1F2328" fo:font-size="12pt" style:font-size-asian="12pt"/>
    </style:style>
    <style:style style:name="P202" style:parent-style-name="Textbody" style:family="paragraph">
      <style:paragraph-properties fo:widows="2" fo:orphans="2" fo:margin-bottom="0.1666in"/>
    </style:style>
    <style:style style:name="T203" style:parent-style-name="StrongEmphasis" style:family="text">
      <style:text-properties style:font-name="Mona Sans VF" fo:color="#1F2328"/>
    </style:style>
    <style:style style:name="T204" style:parent-style-name="DefaultParagraphFont" style:family="text">
      <style:text-properties style:font-name="Mona Sans VF" fo:color="#1F2328"/>
    </style:style>
    <style:style style:name="P205" style:parent-style-name="Textbody" style:family="paragraph">
      <style:paragraph-properties fo:widows="2" fo:orphans="2" fo:margin-bottom="0.1666in"/>
    </style:style>
    <style:style style:name="T206" style:parent-style-name="StrongEmphasis" style:family="text">
      <style:text-properties style:font-name="Mona Sans VF" fo:color="#1F2328"/>
    </style:style>
    <style:style style:name="T207" style:parent-style-name="DefaultParagraphFont" style:family="text">
      <style:text-properties style:font-name="Mona Sans VF" fo:color="#1F2328"/>
    </style:style>
    <style:style style:name="P208" style:parent-style-name="Textbody" style:family="paragraph">
      <style:paragraph-properties fo:widows="2" fo:orphans="2" fo:margin-bottom="0.1666in"/>
    </style:style>
    <style:style style:name="T209" style:parent-style-name="StrongEmphasis" style:family="text">
      <style:text-properties style:font-name="Mona Sans VF" fo:color="#1F2328"/>
    </style:style>
    <style:style style:name="T210" style:parent-style-name="DefaultParagraphFont" style:family="text">
      <style:text-properties style:font-name="Mona Sans VF" fo:color="#1F2328"/>
    </style:style>
    <style:style style:name="P211" style:parent-style-name="Textbody" style:family="paragraph">
      <style:paragraph-properties fo:widows="2" fo:orphans="2" fo:margin-bottom="0.1666in"/>
    </style:style>
    <style:style style:name="T212" style:parent-style-name="StrongEmphasis" style:family="text">
      <style:text-properties style:font-name="Mona Sans VF" fo:color="#1F2328"/>
    </style:style>
    <style:style style:name="T213" style:parent-style-name="DefaultParagraphFont" style:family="text">
      <style:text-properties style:font-name="Mona Sans VF" fo:color="#1F2328"/>
    </style:style>
    <style:style style:name="P214" style:parent-style-name="Textbody" style:family="paragraph">
      <style:paragraph-properties fo:widows="2" fo:orphans="2" fo:margin-bottom="0.1666in"/>
    </style:style>
    <style:style style:name="T215" style:parent-style-name="StrongEmphasis" style:family="text">
      <style:text-properties style:font-name="Mona Sans VF" fo:color="#1F2328"/>
    </style:style>
    <style:style style:name="T216" style:parent-style-name="DefaultParagraphFont" style:family="text">
      <style:text-properties style:font-name="Mona Sans VF" fo:color="#1F2328"/>
    </style:style>
    <style:style style:name="P217" style:parent-style-name="Heading2" style:family="paragraph">
      <style:paragraph-properties fo:widows="2" fo:orphans="2" fo:border-top="none" fo:border-left="none" fo:border-bottom="0.0034in solid #000000" fo:border-right="none" fo:padding="0in" style:shadow="none" fo:margin-top="0.25in" fo:margin-bottom="0.1666in" fo:line-height="125%"/>
      <style:text-properties style:font-name="Mona Sans VF" fo:color="#1F2328" fo:font-size="12pt" style:font-size-asian="12pt"/>
    </style:style>
    <style:style style:name="P218" style:parent-style-name="Textbody" style:family="paragraph">
      <style:paragraph-properties fo:widows="2" fo:orphans="2" fo:margin-bottom="0.1666in"/>
      <style:text-properties fo:color="#0969DA" style:text-underline-type="single" style:text-underline-style="solid" style:text-underline-width="auto" style:text-underline-mode="continuous"/>
    </style:style>
    <style:style style:name="P219" style:parent-style-name="Heading2" style:family="paragraph">
      <style:paragraph-properties fo:widows="2" fo:orphans="2" fo:border-top="none" fo:border-left="none" fo:border-bottom="0.0034in solid #000000" fo:border-right="none" fo:padding="0in" style:shadow="none" fo:margin-top="0.25in" fo:margin-bottom="0.1666in" fo:line-height="125%"/>
      <style:text-properties style:font-name="Mona Sans VF" fo:color="#1F2328" fo:font-size="12pt" style:font-size-asian="12pt"/>
    </style:style>
    <style:style style:name="P220" style:parent-style-name="Textbody" style:family="paragraph">
      <style:paragraph-properties fo:widows="2" fo:orphans="2" fo:margin-bottom="0.1666in"/>
      <style:text-properties style:font-name="Mona Sans VF" fo:color="#1F2328"/>
    </style:style>
    <style:style style:name="P221" style:parent-style-name="Textbody" style:family="paragraph">
      <style:paragraph-properties fo:widows="2" fo:orphans="2" fo:margin-bottom="0.1666in"/>
    </style:style>
    <style:style style:name="T222" style:parent-style-name="DefaultParagraphFont" style:family="text">
      <style:text-properties fo:color="#1F2328"/>
    </style:style>
    <style:style style:name="T223" style:parent-style-name="DefaultParagraphFont" style:family="text">
      <style:text-properties fo:color="#1F2328"/>
    </style:style>
    <style:style style:name="T224" style:parent-style-name="DefaultParagraphFont" style:family="text">
      <style:text-properties style:font-name="Mona Sans VF" fo:color="#1F2328"/>
    </style:style>
    <style:style style:name="P225" style:parent-style-name="Textbody" style:family="paragraph">
      <style:paragraph-properties fo:widows="2" fo:orphans="2" fo:margin-bottom="0.1666in"/>
    </style:style>
    <style:style style:name="T226" style:parent-style-name="DefaultParagraphFont" style:family="text">
      <style:text-properties fo:color="#1F2328"/>
    </style:style>
    <style:style style:name="T227" style:parent-style-name="DefaultParagraphFont" style:family="text">
      <style:text-properties fo:color="#1F2328"/>
    </style:style>
    <style:style style:name="T228" style:parent-style-name="DefaultParagraphFont" style:family="text">
      <style:text-properties style:font-name="Mona Sans VF" fo:color="#1F2328"/>
    </style:style>
    <style:style style:name="P229" style:parent-style-name="Textbody" style:family="paragraph">
      <style:paragraph-properties fo:widows="2" fo:orphans="2" fo:margin-bottom="0.1666in"/>
    </style:style>
    <style:style style:name="T230" style:parent-style-name="DefaultParagraphFont" style:family="text">
      <style:text-properties fo:color="#1F2328"/>
    </style:style>
    <style:style style:name="T231" style:parent-style-name="DefaultParagraphFont" style:family="text">
      <style:text-properties fo:color="#1F2328"/>
    </style:style>
    <style:style style:name="T232" style:parent-style-name="DefaultParagraphFont" style:family="text">
      <style:text-properties style:font-name="Mona Sans VF" fo:color="#1F2328"/>
    </style:style>
    <style:style style:name="T233" style:parent-style-name="DefaultParagraphFont" style:family="text">
      <style:text-properties style:font-name="Mona Sans VF" fo:color="#1F2328"/>
    </style:style>
    <style:style style:name="P234" style:parent-style-name="Textbody" style:family="paragraph">
      <style:paragraph-properties fo:widows="2" fo:orphans="2" fo:margin-bottom="0.1666in"/>
    </style:style>
    <style:style style:name="T235" style:parent-style-name="DefaultParagraphFont" style:family="text">
      <style:text-properties fo:color="#1F2328"/>
    </style:style>
    <style:style style:name="T236" style:parent-style-name="DefaultParagraphFont" style:family="text">
      <style:text-properties fo:color="#1F2328"/>
    </style:style>
    <style:style style:name="T237" style:parent-style-name="DefaultParagraphFont" style:family="text">
      <style:text-properties style:font-name="Mona Sans VF" fo:color="#1F2328"/>
    </style:style>
    <style:style style:name="P238" style:parent-style-name="Heading2" style:family="paragraph">
      <style:paragraph-properties fo:widows="2" fo:orphans="2" fo:border-top="none" fo:border-left="none" fo:border-bottom="0.0034in solid #000000" fo:border-right="none" fo:padding="0in" style:shadow="none" fo:margin-top="0.25in" fo:margin-bottom="0.1666in" fo:line-height="125%"/>
      <style:text-properties style:font-name="Mona Sans VF" fo:color="#1F2328" fo:font-size="12pt" style:font-size-asian="12pt"/>
    </style:style>
    <style:style style:name="P239" style:parent-style-name="Textbody" style:family="paragraph">
      <style:paragraph-properties fo:widows="2" fo:orphans="2" fo:margin-bottom="0.1666in"/>
      <style:text-properties style:font-name="Mona Sans VF" fo:color="#1F2328"/>
    </style:style>
    <style:style style:name="P240" style:parent-style-name="Textbody" style:family="paragraph">
      <style:paragraph-properties fo:widows="2" fo:orphans="2" fo:margin-bottom="0.1666in"/>
      <style:text-properties style:font-name="Mona Sans VF" fo:color="#1F2328"/>
    </style:style>
    <style:style style:name="P241" style:parent-style-name="Textbody" style:family="paragraph">
      <style:paragraph-properties fo:widows="2" fo:orphans="2" fo:margin-bottom="0.1666in"/>
      <style:text-properties style:font-name="Mona Sans VF" fo:color="#1F2328"/>
    </style:style>
    <style:style style:name="P242" style:parent-style-name="Textbody" style:family="paragraph">
      <style:paragraph-properties fo:widows="2" fo:orphans="2" fo:margin-bottom="0.1666in"/>
      <style:text-properties style:font-name="Mona Sans VF" fo:color="#1F2328"/>
    </style:style>
    <style:style style:name="P243" style:parent-style-name="Textbody" style:family="paragraph">
      <style:paragraph-properties fo:widows="2" fo:orphans="2" fo:margin-bottom="0.1666in"/>
      <style:text-properties style:font-name="Mona Sans VF" fo:color="#1F2328"/>
    </style:style>
    <style:style style:name="P244" style:parent-style-name="Heading2" style:family="paragraph">
      <style:paragraph-properties fo:widows="2" fo:orphans="2" fo:border-top="none" fo:border-left="none" fo:border-bottom="0.0034in solid #000000" fo:border-right="none" fo:padding="0in" style:shadow="none" fo:margin-top="0.25in" fo:margin-bottom="0.1666in" fo:line-height="125%"/>
    </style:style>
    <style:style style:name="T245" style:parent-style-name="DefaultParagraphFont" style:family="text">
      <style:text-properties fo:color="#1F2328"/>
    </style:style>
    <style:style style:name="T246" style:parent-style-name="DefaultParagraphFont" style:family="text">
      <style:text-properties fo:color="#1F2328"/>
    </style:style>
    <style:style style:name="T247" style:parent-style-name="DefaultParagraphFont" style:family="text">
      <style:text-properties style:font-name="Mona Sans VF" fo:color="#1F2328" fo:font-size="12pt" style:font-size-asian="12pt"/>
    </style:style>
    <style:style style:name="P248" style:parent-style-name="Textbody" style:family="paragraph">
      <style:paragraph-properties fo:widows="2" fo:orphans="2" fo:margin-bottom="0.1666in"/>
      <style:text-properties style:font-name="Mona Sans VF" fo:color="#1F2328"/>
    </style:style>
    <style:style style:name="P249" style:parent-style-name="Textbody" style:family="paragraph">
      <style:paragraph-properties fo:widows="2" fo:orphans="2" fo:margin-bottom="0.1666in"/>
    </style:style>
    <style:style style:name="T250" style:parent-style-name="DefaultParagraphFont" style:family="text">
      <style:text-properties fo:color="#1F2328"/>
    </style:style>
    <style:style style:name="T251" style:parent-style-name="DefaultParagraphFont" style:family="text">
      <style:text-properties fo:color="#1F2328"/>
    </style:style>
    <style:style style:name="T252" style:parent-style-name="DefaultParagraphFont" style:family="text">
      <style:text-properties style:font-name="Mona Sans VF" fo:color="#1F2328"/>
    </style:style>
    <style:style style:name="P253" style:parent-style-name="Textbody" style:family="paragraph">
      <style:paragraph-properties fo:widows="2" fo:orphans="2" fo:margin-bottom="0.1666in"/>
      <style:text-properties style:font-name="Mona Sans VF" fo:color="#1F2328"/>
    </style:style>
    <style:style style:name="P254" style:parent-style-name="Textbody" style:family="paragraph">
      <style:paragraph-properties fo:widows="2" fo:orphans="2" fo:margin-bottom="0.1666in"/>
      <style:text-properties style:font-name="Mona Sans VF" fo:color="#1F2328"/>
    </style:style>
    <style:style style:name="P255" style:parent-style-name="Textbody" style:family="paragraph">
      <style:paragraph-properties fo:widows="2" fo:orphans="2" fo:margin-bottom="0.1666in"/>
      <style:text-properties style:font-name="Mona Sans VF" fo:color="#1F2328"/>
    </style:style>
    <style:style style:name="P256" style:parent-style-name="Textbody" style:family="paragraph">
      <style:paragraph-properties fo:widows="2" fo:orphans="2" fo:margin-bottom="0.1666in"/>
    </style:style>
    <style:style style:name="T257" style:parent-style-name="StrongEmphasis" style:family="text">
      <style:text-properties style:font-name="Mona Sans VF" fo:color="#1F2328"/>
    </style:style>
    <style:style style:name="T258" style:parent-style-name="DefaultParagraphFont" style:family="text">
      <style:text-properties style:font-name="Mona Sans VF" fo:color="#1F2328"/>
    </style:style>
    <style:style style:name="T259" style:parent-style-name="DefaultParagraphFont" style:family="text">
      <style:text-properties style:font-name-asian="Mona Sans VF" fo:color="#1F2328"/>
    </style:style>
    <style:style style:name="P260" style:parent-style-name="Textbody" style:family="paragraph">
      <style:paragraph-properties fo:widows="2" fo:orphans="2" fo:margin-bottom="0in"/>
      <style:text-properties style:font-name="Mona Sans VF" fo:color="#1F2328"/>
    </style:style>
    <style:style style:family="graphic" style:name="a1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paragraph" style:vertical-rel="page" style:horizontal-pos="from-left" style:vertical-pos="from-top" draw:auto-grow-width="true" draw:auto-grow-height="true"/>
      <style:paragraph-properties/>
    </style:style>
    <style:style style:family="graphic" style:name="a1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paragraph" style:vertical-rel="page" style:horizontal-pos="from-left" style:vertical-pos="from-top" draw:auto-grow-width="true" draw:auto-grow-height="true"/>
      <style:paragraph-properties/>
    </style:style>
    <style:style style:family="graphic" style:name="a1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paragraph" style:vertical-rel="page" style:horizontal-pos="from-left" style:vertical-pos="from-top" draw:auto-grow-width="true" draw:auto-grow-height="true"/>
      <style:paragraph-properties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paragraph" style:vertical-rel="page" style:horizontal-pos="from-left" style:vertical-pos="from-top" draw:auto-grow-width="true" draw:auto-grow-height="true"/>
      <style:paragraph-properties/>
    </style:style>
    <style:style style:family="graphic" style:name="a1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paragraph" style:vertical-rel="page" style:horizontal-pos="from-left" style:vertical-pos="from-top" draw:auto-grow-width="true" draw:auto-grow-height="true"/>
      <style:paragraph-properties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paragraph" style:vertical-rel="page" style:horizontal-pos="from-left" style:vertical-pos="from-top" draw:auto-grow-width="true" draw:auto-grow-height="true"/>
      <style:paragraph-properties/>
    </style:style>
    <style:style style:family="graphic" style:name="a1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paragraph" style:vertical-rel="page" style:horizontal-pos="from-left" style:vertical-pos="from-top" draw:auto-grow-width="true" draw:auto-grow-height="true"/>
      <style:paragraph-properties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paragraph" style:vertical-rel="page" style:horizontal-pos="from-left" style:vertical-pos="from-top" draw:auto-grow-width="true" draw:auto-grow-height="true"/>
      <style:paragraph-properties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paragraph" style:vertical-rel="page" style:horizontal-pos="from-left" style:vertical-pos="from-top" draw:auto-grow-width="true" draw:auto-grow-height="true"/>
      <style:paragraph-properties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paragraph" style:vertical-rel="page" style:horizontal-pos="from-left" style:vertical-pos="from-top" draw:auto-grow-width="true" draw:auto-grow-height="true"/>
      <style:paragraph-properties/>
    </style:style>
    <style:style style:family="graphic" style:name="a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paragraph" style:vertical-rel="page" style:horizontal-pos="from-left" style:vertical-pos="from-top" draw:auto-grow-width="true" draw:auto-grow-height="true"/>
      <style:paragraph-properties/>
    </style:style>
    <style:style style:family="graphic" style:name="a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paragraph" style:vertical-rel="page" style:horizontal-pos="from-left" style:vertical-pos="from-top" draw:auto-grow-width="true" draw:auto-grow-height="true"/>
      <style:paragraph-properties/>
    </style:style>
    <style:style style:family="graphic" style:name="a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paragraph" style:vertical-rel="page" style:horizontal-pos="from-left" style:vertical-pos="from-top" draw:auto-grow-width="true" draw:auto-grow-height="true"/>
      <style:paragraph-properties/>
    </style:style>
    <style:style style:family="graphic" style:name="a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paragraph" style:vertical-rel="page" style:horizontal-pos="from-left" style:vertical-pos="from-top" draw:auto-grow-width="true" draw:auto-grow-height="true"/>
      <style:paragraph-properties/>
    </style:style>
    <style:style style:family="graphic" style:name="a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paragraph" style:vertical-rel="page" style:horizontal-pos="from-left" style:vertical-pos="from-top" draw:auto-grow-width="true" draw:auto-grow-height="true"/>
      <style:paragraph-properties/>
    </style:style>
  </office:automatic-styles>
  <office:body>
    <office:text text:use-soft-page-breaks="true">
      <text:p text:style-name="P1"><text:span text:style-name="T2"><draw:frame draw:z-index="2" draw:id="id0" draw:style-name="a0" draw:name="user-content--welcome-to-my-github-profile" text:anchor-type="paragraph" svg:x="-0.29167in" svg:y="0.46875in" svg:width="0.29167in" svg:height="0.29167in" style:rel-width="scale" style:rel-height="scale-min"><draw:text-box><text:p text:style-name="Textbody"/></draw:text-box><svg:desc/></draw:frame></text:span><text:span text:style-name="T3"><draw:frame draw:z-index="3" draw:id="id1" draw:style-name="a1" draw:name="user-content--about-me" text:anchor-type="paragraph" svg:x="-0.29167in" svg:y="0.1875in" svg:width="0.29167in" svg:height="0.29167in" style:rel-width="scale" style:rel-height="scale-min"><draw:text-box><text:p text:style-name="Textbody"/></draw:text-box><svg:desc/></draw:frame></text:span><text:span text:style-name="T4"><draw:frame draw:z-index="4" draw:id="id2" draw:style-name="a2" draw:name="user-content--featured-projects" text:anchor-type="paragraph" svg:x="-0.29167in" svg:y="0.1875in" svg:width="0.29167in" svg:height="0.29167in" style:rel-width="scale" style:rel-height="scale-min"><draw:text-box><text:p text:style-name="Textbody"/></draw:text-box><svg:desc/></draw:frame></text:span><text:span text:style-name="T5"><draw:frame draw:z-index="5" draw:id="id3" draw:style-name="a3" draw:name="user-content-kpgm---key-power-grail-mystery" text:anchor-type="paragraph" svg:x="-0.29167in" svg:y="0.125in" svg:width="0.29167in" svg:height="0.29167in" style:rel-width="scale" style:rel-height="scale-min"><draw:text-box><text:p text:style-name="Textbody"/></draw:text-box><svg:desc/></draw:frame></text:span><text:span text:style-name="T6"><draw:frame draw:z-index="6" draw:id="id4" draw:style-name="a4" draw:name="user-content-jkpgm" text:anchor-type="paragraph" svg:x="-0.29167in" svg:y="0.125in" svg:width="0.29167in" svg:height="0.29167in" style:rel-width="scale" style:rel-height="scale-min"><draw:text-box><text:p text:style-name="Textbody"/></draw:text-box><svg:desc/></draw:frame></text:span><text:span text:style-name="T7"><draw:frame draw:z-index="7" draw:id="id5" draw:style-name="a5" draw:name="user-content-xrptc" text:anchor-type="paragraph" svg:x="-0.29167in" svg:y="0.125in" svg:width="0.29167in" svg:height="0.29167in" style:rel-width="scale" style:rel-height="scale-min"><draw:text-box><text:p text:style-name="Textbody"/></draw:text-box><svg:desc/></draw:frame></text:span><text:span text:style-name="T8"><draw:frame draw:z-index="8" draw:id="id6" draw:style-name="a6" draw:name="user-content--connect-with-me" text:anchor-type="paragraph" svg:x="-0.29167in" svg:y="0.1875in" svg:width="0.29167in" svg:height="0.29167in" style:rel-width="scale" style:rel-height="scale-min"><draw:text-box><text:p text:style-name="Textbody"/></draw:text-box><svg:desc/></draw:frame></text:span><text:span text:style-name="T9"><draw:frame draw:z-index="9" draw:id="id7" draw:style-name="a7" draw:name="user-content-social-networks" text:anchor-type="paragraph" svg:x="-0.29167in" svg:y="0.125in" svg:width="0.29167in" svg:height="0.29167in" style:rel-width="scale" style:rel-height="scale-min"><draw:text-box><text:p text:style-name="Textbody"/></draw:text-box><svg:desc/></draw:frame></text:span><text:span text:style-name="T10"><draw:frame draw:z-index="10" draw:id="id8" draw:style-name="a8" draw:name="user-content-professional-networks" text:anchor-type="paragraph" svg:x="-0.29167in" svg:y="0.125in" svg:width="0.29167in" svg:height="0.29167in" style:rel-width="scale" style:rel-height="scale-min"><draw:text-box><text:p text:style-name="Textbody"/></draw:text-box><svg:desc/></draw:frame></text:span><text:span text:style-name="T11"><draw:frame draw:z-index="11" draw:id="id9" draw:style-name="a9" draw:name="user-content-crypto-platforms" text:anchor-type="paragraph" svg:x="-0.29167in" svg:y="0.125in" svg:width="0.29167in" svg:height="0.29167in" style:rel-width="scale" style:rel-height="scale-min"><draw:text-box><text:p text:style-name="Textbody"/></draw:text-box><svg:desc/></draw:frame></text:span><text:span text:style-name="T12"><draw:frame draw:z-index="12" draw:id="id10" draw:style-name="a10" draw:name="user-content-️-skills--technologies" text:anchor-type="paragraph" svg:x="-0.29167in" svg:y="0.1875in" svg:width="0.29167in" svg:height="0.29167in" style:rel-width="scale" style:rel-height="scale-min"><draw:text-box><text:p text:style-name="Textbody"/></draw:text-box><svg:desc/></draw:frame></text:span><text:span text:style-name="T13"><draw:frame draw:z-index="13" draw:id="id11" draw:style-name="a11" draw:name="user-content--github-statistics" text:anchor-type="paragraph" svg:x="-0.29167in" svg:y="0.1875in" svg:width="0.29167in" svg:height="0.29167in" style:rel-width="scale" style:rel-height="scale-min"><draw:text-box><text:p text:style-name="Textbody"/></draw:text-box><svg:desc/></draw:frame></text:span><text:span text:style-name="T14"><draw:frame draw:z-index="14" draw:id="id12" draw:style-name="a12" draw:name="user-content--my-mission" text:anchor-type="paragraph" svg:x="-0.29167in" svg:y="0.1875in" svg:width="0.29167in" svg:height="0.29167in" style:rel-width="scale" style:rel-height="scale-min"><draw:text-box><text:p text:style-name="Textbody"/></draw:text-box><svg:desc/></draw:frame></text:span><text:span text:style-name="T15"><draw:frame draw:z-index="15" draw:id="id13" draw:style-name="a13" draw:name="user-content--lets-collaborate" text:anchor-type="paragraph" svg:x="-0.29167in" svg:y="0.1875in" svg:width="0.29167in" svg:height="0.29167in" style:rel-width="scale" style:rel-height="scale-min"><draw:text-box><text:p text:style-name="Textbody"/></draw:text-box><svg:desc/></draw:frame></text:span><text:span text:style-name="T16"><draw:frame draw:z-index="16" draw:id="id14" draw:style-name="a14" draw:name="user-content--support-my-work" text:anchor-type="paragraph" svg:x="-0.29167in" svg:y="0.1875in" svg:width="0.29167in" svg:height="0.29167in" style:rel-width="scale" style:rel-height="scale-min"><draw:text-box><text:p text:style-name="Textbody"/></draw:text-box><svg:desc/></draw:frame></text:span><text:span text:style-name="T17"><text:s/></text:span><text:span text:style-name="T18">README з усіма деталями!<text:s/></text:span></text:p>
      <text:p text:style-name="P19"><text:span text:style-name="T20">✅</text:span><text:span text:style-name="T21"> </text:span><text:span text:style-name="T22">Включено</text:span><text:span text:style-name="T23">:</text:span></text:p>
      <text:list text:style-name="LFO1" text:continue-numbering="true">
        <text:list-item>
          <text:p text:style-name="P24">Ваша роль: Blockchain Developer &amp; Memtoken Creator</text:p>
        </text:list-item>
        <text:list-item>
          <text:p text:style-name="P25">Всі 3 токени (KPGM, JKPGM, XRPTC) з адресами</text:p>
        </text:list-item>
        <text:list-item>
          <text:p text:style-name="P26">Всі соціальні мережі та контакти</text:p>
        </text:list-item>
        <text:list-item>
          <text:p text:style-name="P27">CoinMarketCap і Gecko Terminal профілі</text:p>
        </text:list-item>
        <text:list-item>
          <text:p text:style-name="P28">GitHub статистика</text:p>
        </text:list-item>
        <text:list-item>
          <text:p text:style-name="P29">Секція про Web3 фокус і Solana</text:p>
        </text:list-item>
        <text:list-item>
          <text:p text:style-name="P30">Профайл на Raydium.io</text:p>
        </text:list-item>
      </text:list>
      <text:p text:style-name="P31"/>
      <text:p text:style-name="P32"><text:span text:style-name="T33">Щоб завантажити цей README на GitHub</text:span><text:span text:style-name="T34">, вам потрібно:</text:span></text:p>
      <text:list text:style-name="LFO2" text:continue-numbering="true">
        <text:list-item>
          <text:p text:style-name="P35"><text:span text:style-name="T36">Перейти на</text:span><text:span text:style-name="T37"> </text:span><text:a xlink:href="https://github.com/new" office:target-frame-name="_top" xlink:show="replace"><text:span text:style-name="T38">https://github.com/new</text:span></text:a></text:p>
        </text:list-item>
        <text:list-item>
          <text:p text:style-name="P39"><text:span text:style-name="T40">Створити новий public репозиторій</text:span><text:span text:style-name="T41"> з назвою </text:span><text:span text:style-name="T42">IosypDavyd</text:span><text:span text:style-name="T43"> (точно така ж, як ваше ім'я користувача)</text:span></text:p>
        </text:list-item>
        <text:list-item>
          <text:p text:style-name="P44"><text:span text:style-name="T45">Скопіювати в</text:span><text:span text:style-name="T46">есь текст</text:span><text:span text:style-name="T47"> README вище</text:span></text:p>
        </text:list-item>
        <text:list-item>
          <text:p text:style-name="P48"><text:span text:style-name="T49">Вставити</text:span><text:span text:style-name="T50"> в файл </text:span><text:span text:style-name="T51">README.md</text:span></text:p>
        </text:list-item>
        <text:list-item>
          <text:p text:style-name="P52"><text:span text:style-name="T53">Commit &amp; Push</text:span></text:p>
        </text:list-item>
      </text:list>
      <text:p text:style-name="P54">Після цього цей README автоматично з'явиться на вашому GitHub профілі! ?</text:p>
      <text:p text:style-name="P55">Потрібна допомога з чимось ще? ?</text:p>
      <text:h text:style-name="P56" text:outline-level="3">Make these code changes?</text:h>
      <text:p text:style-name="P57">README.md</text:p>
      <text:p text:style-name="Standard"/>
      <text:p text:style-name="Standard"/>
      <text:p text:style-name="Standard">#<text:s/>👋<text:s/>Welcome to My GitHub Profile</text:p>
      <text:p text:style-name="Standard"/>
      <text:p text:style-name="Standard">**Blockchain<text:s/>Developer &amp; Memtoken Creator** | Building on **Solana** with **Raydium.io**</text:p>
      <text:p text:style-name="Standard"/>
      <text:p text:style-name="Standard">---</text:p>
      <text:p text:style-name="Standard"/>
      <text:p text:style-name="Standard">##<text:s/>🚀<text:s/>About Me</text:p>
      <text:p text:style-name="Standard"/>
      <text:p text:style-name="Standard">I'm a blockchain developer and crypto enthusiast focused on creating innovative memtokens on the Solana network. I specialize in building projects using<text:s/>Raydium.io and fostering strong communities around Web3 initiatives.</text:p>
      <text:p text:style-name="Standard"/>
      <text:p text:style-name="Standard">-<text:s/>🔗<text:s/>**Blockchain Focus**: Solana Network &amp; DeFi Projects</text:p>
      <text:p text:style-name="Standard">-<text:s/>💎<text:s/>**Creator**: Multiple memtokens with active communities</text:p>
      <text:p text:style-name="Standard">-<text:s/>🌱<text:s/>**Builder**: Leveraging Raydium.io for token launches</text:p>
      <text:p text:style-name="Standard">-<text:s/>🤝<text:s/>**Community Focused**: Engaging across multiple platforms</text:p>
      <text:p text:style-name="Standard">- ✨ **Mission**: Creating valuable Web3 experiences</text:p>
      <text:p text:style-name="Standard"/>
      <text:p text:style-name="Standard">---</text:p>
      <text:p text:style-name="Standard"/>
      <text:p text:style-name="Standard">##<text:s/>💎<text:s/>Featured Projects</text:p>
      <text:p text:style-name="Standard"/>
      <text:p text:style-name="Standard">### **KPGM** - Key Power Grail Mystery</text:p>
      <text:p text:style-name="Standard">- **Token Address**: `EBRBXt79AyC2TVDLQAoBB6L7fgsctqS7DTevkwPuhray`</text:p>
      <text:p text:style-name="Standard">- **Platform**: Raydium.io</text:p>
      <text:p text:style-name="Standard">- **Status**: Active &amp; Growing Community</text:p>
      <text:p text:style-name="Standard">- **Description**: Strong community-driven memtoken on Solana</text:p>
      <text:p text:style-name="Standard"/>
      <text:p text:style-name="Standard">### **JKPGM**</text:p>
      <text:p text:style-name="Standard">- **Token Address**: `8bHmWm3vRUqfpXKszGnYyzLbwMtcN9bb7bZceUatEray`</text:p>
      <text:p text:style-name="Standard">- **Platform**: Raydium.io</text:p>
      <text:p text:style-name="Standard"/>
      <text:p text:style-name="Standard">### **XRPTC**</text:p>
      <text:p text:style-name="Standard">- **Token Address**: `D3a2hQhYJsaU7UUuJgjmDzLhSaohWP9PCmm6Umip8ray`</text:p>
      <text:p text:style-name="Standard">- **Platform**: Raydium.io</text:p>
      <text:p text:style-name="Standard"/>
      <text:p text:style-name="Standard">---</text:p>
      <text:p text:style-name="Standard"/>
      <text:p text:style-name="Standard">##<text:s/>🔗<text:s/>Connect With Me</text:p>
      <text:p text:style-name="Standard"/>
      <text:p text:style-name="Standard">### Social Networks</text:p>
      <text:p text:style-name="Standard">-<text:s/>🐦<text:s/>**X/Twitter**: [@KpgmSol](https://x.com/KpgmSol) | [@IosypDavyd1985](https://x.com/IosypDavyd1985) |<text:s/>[@SerafimCoin444](https://x.com/SerafimCoin444)</text:p>
      <text:p text:style-name="Standard">-<text:s/>📱<text:s/>**Telegram**: [KPGM_SOL](https://t.me/KPGM_SOL) | [Community Group](https://t.me/+q9VhY8ypidxiNjRk)</text:p>
      <text:p text:style-name="Standard">-<text:s/>💬<text:s/>**Discord**: [Join Server](https://discord.gg/2VWXC2az)</text:p>
      <text:p text:style-name="Standard">-<text:s/>📺<text:s/>**YouTube**: [@iosypdavyd_books](https://youtube.com/@iosypdavyd_books?si=2S6J8KFf6U_iLOD8)</text:p>
      <text:p text:style-name="Standard">-<text:s/>🎬<text:s/>**TikTok**: [@kpgm2026](https://tiktok.com/@kpgm2026)</text:p>
      <text:p text:style-name="Standard">-<text:s/>📖<text:s/>**Medium**: [@ruslanmatey](https://medium.com/@ruslanmatey)</text:p>
      <text:p text:style-name="Standard"/>
      <text:p text:style-name="Standard">### Professional Networks</text:p>
      <text:p text:style-name="Standard">-<text:s/>💼<text:s/>**LinkedIn**: [Iosyp Davyd](https://www.linkedin.com/in/iosyp-davyd-01bbb82b4)</text:p>
      <text:p text:style-name="Standard">-<text:s/>📘<text:s/>**Facebook**: [Yosip David](https://www.facebook.com/yosip.david)</text:p>
      <text:p text:style-name="Standard">-<text:s/>🖼️<text:s/>**Instagram**: [@serafim4442025](https://www.instagram.com/serafim4442025)</text:p>
      <text:p text:style-name="Standard">-<text:s/>🔍<text:s/>**Reddit**: [Decent_Impression653](https://www.reddit.com/u/Decent_Impression653)</text:p>
      <text:p text:style-name="Standard"/>
      <text:p text:style-name="Standard">### Crypto Platforms</text:p>
      <text:p text:style-name="Standard">-<text:s/>📊<text:s/>**CoinMarketCap**: @User_hzov86453813</text:p>
      <text:p text:style-name="Standard">-<text:s/>📈<text:s/>**Gecko Terminal**: @User_hzov86453813</text:p>
      <text:p text:style-name="Standard"/>
      <text:p text:style-name="Standard">---</text:p>
      <text:p text:style-name="Standard"/>
      <text:p text:style-name="Standard">##<text:s/>🛠️<text:s/>Skills &amp; Technologies</text:p>
      <text:p text:style-name="Standard"/>
      <text:p text:style-name="Standard">- **Blockchain**: Solana, Smart Contracts</text:p>
      <text:p text:style-name="Standard">- **DeFi Platforms**: Raydium.io, SPL Tokens</text:p>
      <text:p text:style-name="Standard">-<text:s/>**Community Building**: Discord, Telegram, Social Media Management</text:p>
      <text:p text:style-name="Standard">- **Content Creation**: YouTube, TikTok, Medium, Twitter</text:p>
      <text:p text:style-name="Standard">- **Crypto Analytics**: CoinMarketCap, Gecko Terminal</text:p>
      <text:p text:style-name="Standard"/>
      <text:p text:style-name="Standard">---</text:p>
      <text:p text:style-name="Standard"/>
      <text:p text:style-name="Standard">##<text:s/>📊<text:s/>GitHub Statistics</text:p>
      <text:p text:style-name="Standard"/>
      <text:p text:style-name="Standard">![GitHub<text:s/>Stats](https://github-readme-stats.vercel.app/api?username=IosypDavyd&amp;show_icons=true&amp;theme=radical)</text:p>
      <text:p text:style-name="Standard"/>
      <text:p text:style-name="Standard">![Top Languages](https://github-readme-stats.vercel.app/api/top-langs/?username=IosypDavyd&amp;layout=compact&amp;theme=radical)</text:p>
      <text:p text:style-name="Standard"/>
      <text:p text:style-name="Standard">---</text:p>
      <text:p text:style-name="Standard"/>
      <text:p text:style-name="Standard">##<text:s/>🎯<text:s/>My Mission</text:p>
      <text:p text:style-name="Standard"/>
      <text:p text:style-name="Standard">Building<text:s/>sustainable Web3 projects with:</text:p>
      <text:p text:style-name="Standard">- ✅ Strong, engaged communities</text:p>
      <text:p text:style-name="Standard">- ✅ Transparent development practices</text:p>
      <text:p text:style-name="Standard">- ✅ Multi-platform presence &amp; engagement</text:p>
      <text:p text:style-name="Standard">- ✅ Innovative tokenomics on Solana</text:p>
      <text:p text:style-name="Standard"/>
      <text:p text:style-name="Standard">---</text:p>
      <text:p text:style-name="Standard"/>
      <text:p text:style-name="Standard">##<text:s/>📈<text:s/>Let's Collaborate</text:p>
      <text:p text:style-name="Standard"/>
      <text:p text:style-name="Standard">I'm always open to:</text:p>
      <text:p text:style-name="Standard">-<text:s/>🤝<text:s/>Collaborating on blockchain projects</text:p>
      <text:p text:style-name="Standard">-<text:s/>💡<text:s/>Discussing Web3 innovations</text:p>
      <text:p text:style-name="Standard">-<text:s/>🚀<text:s/>Building communities around shared interests</text:p>
      <text:p text:style-name="Standard">-<text:s/>📡<text:s/>Cross-platform partnerships</text:p>
      <text:p text:style-name="Standard"/>
      <text:p text:style-name="Standard">---</text:p>
      <text:p text:style-name="Standard"/>
      <text:p text:style-name="Standard">##<text:s/>⭐<text:s/>Support My Work</text:p>
      <text:p text:style-name="Standard"/>
      <text:p text:style-name="Standard">If you find value in my projects:</text:p>
      <text:p text:style-name="Standard">-<text:s/>⭐<text:s/>Star my repositories</text:p>
      <text:p text:style-name="Standard">-<text:s/>🔔<text:s/>Follow on social media</text:p>
      <text:p text:style-name="Standard">-<text:s/>💬<text:s/>Join<text:s/>our community</text:p>
      <text:p text:style-name="Standard">-<text:s/>🤝<text:s/>Share feedback and ideas</text:p>
      <text:p text:style-name="Standard"/>
      <text:p text:style-name="Standard">---</text:p>
      <text:p text:style-name="Standard"/>
      <text:p text:style-name="Standard">**"Building the future of Web3, one token at a time."**<text:s/>🚀✨</text:p>
      <text:p text:style-name="Standard"/>
      <text:p text:style-name="Standard">Last Updated: May 2026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58" text:outline-level="1">? Welcome to My GitHub Profile</text:h>
      <text:p text:style-name="P59"><text:span text:style-name="T60">Blockchain Developer &amp;</text:span><text:span text:style-name="T61"><text:s/>Memtoken Creator</text:span><text:span text:style-name="T62"> | Building on </text:span><text:span text:style-name="T63">Solana</text:span><text:span text:style-name="T64"> with </text:span><text:span text:style-name="T65">Raydium.io</text:span></text:p>
      <text:p text:style-name="HorizontalLine"/>
      <text:h text:style-name="P66" text:outline-level="2">? About Me</text:h>
      <text:p text:style-name="P67">I'm a blockchain developer and crypto enthusiast focused on creating innovative memtokens on the Solana network. I specialize in building projects using Raydium.io and fostering strong<text:s/>communities around Web3 initiatives.</text:p>
      <text:list text:style-name="LFO3" text:continue-numbering="true">
        <text:list-item>
          <text:p text:style-name="P68"><text:span text:style-name="T69">? </text:span><text:span text:style-name="T70">Blockchain Focus</text:span><text:span text:style-name="T71">: Solana Network &amp; DeFi Projects</text:span></text:p>
        </text:list-item>
        <text:list-item>
          <text:p text:style-name="P72"><text:span text:style-name="T73">? </text:span><text:span text:style-name="T74">Creator</text:span><text:span text:style-name="T75">: Multiple memtokens with active communities</text:span></text:p>
        </text:list-item>
        <text:list-item>
          <text:p text:style-name="P76"><text:span text:style-name="T77">? </text:span><text:span text:style-name="T78">Builder</text:span><text:span text:style-name="T79">: Leveraging Raydium.io for token launches</text:span></text:p>
        </text:list-item>
        <text:list-item>
          <text:p text:style-name="P80"><text:span text:style-name="T81">? </text:span><text:span text:style-name="T82">Community Focused</text:span><text:span text:style-name="T83">: Engaging across multiple platforms</text:span></text:p>
        </text:list-item>
        <text:list-item>
          <text:p text:style-name="P84"><text:span text:style-name="T85">✨</text:span><text:span text:style-name="T86"> </text:span><text:span text:style-name="T87">Miss</text:span><text:span text:style-name="T88">ion</text:span><text:span text:style-name="T89">: Creating valuable Web3 experiences</text:span></text:p>
        </text:list-item>
      </text:list>
      <text:p text:style-name="HorizontalLine"/>
      <text:h text:style-name="P90" text:outline-level="2">? Featured Projects</text:h>
      <text:h text:style-name="P91" text:outline-level="3"><text:span text:style-name="T92">KPGM</text:span><text:span text:style-name="T93"> - Key Power Grail Mystery</text:span></text:h>
      <text:list text:style-name="LFO4" text:continue-numbering="true">
        <text:list-item>
          <text:p text:style-name="P94"><text:span text:style-name="T95">Token Address</text:span><text:span text:style-name="T96">: </text:span><text:span text:style-name="T97">EBRBXt79AyC2TVDLQAoBB6L7fgsctqS7DTevkwPuhray</text:span></text:p>
        </text:list-item>
        <text:list-item>
          <text:p text:style-name="P98"><text:span text:style-name="T99">Platform</text:span><text:span text:style-name="T100">: Raydium.io</text:span></text:p>
        </text:list-item>
        <text:list-item>
          <text:p text:style-name="P101"><text:span text:style-name="T102">Status</text:span><text:span text:style-name="T103">: Active &amp; Growing Community</text:span></text:p>
        </text:list-item>
        <text:list-item>
          <text:p text:style-name="P104"><text:span text:style-name="T105">Description</text:span><text:span text:style-name="T106">: Strong community-driven memtoken on</text:span><text:span text:style-name="T107"><text:s/>Solana</text:span></text:p>
        </text:list-item>
      </text:list>
      <text:h text:style-name="P108" text:outline-level="3"><text:span text:style-name="T109">JKPGM</text:span></text:h>
      <text:list text:style-name="LFO5" text:continue-numbering="true">
        <text:list-item>
          <text:p text:style-name="P110"><text:span text:style-name="T111">Token Address</text:span><text:span text:style-name="T112">: </text:span><text:span text:style-name="T113">8bHmWm3vRUqfpXKszGnYyzLbwMtcN9bb7bZceUatEray</text:span></text:p>
        </text:list-item>
        <text:list-item>
          <text:p text:style-name="P114"><text:span text:style-name="T115">Platform</text:span><text:span text:style-name="T116">: Raydium.io</text:span></text:p>
        </text:list-item>
      </text:list>
      <text:h text:style-name="P117" text:outline-level="3"><text:span text:style-name="T118">XRPTC</text:span></text:h>
      <text:list text:style-name="LFO6" text:continue-numbering="true">
        <text:list-item>
          <text:p text:style-name="P119"><text:span text:style-name="T120">Token Address</text:span><text:span text:style-name="T121">: </text:span><text:span text:style-name="T122">D3a2hQhYJsaU7UUuJgjmDzLhSaohWP9PCmm6Umip8ray</text:span></text:p>
        </text:list-item>
        <text:list-item>
          <text:p text:style-name="P123"><text:span text:style-name="T124">Platform</text:span><text:span text:style-name="T125">: Raydium.io</text:span></text:p>
        </text:list-item>
      </text:list>
      <text:p text:style-name="HorizontalLine"/>
      <text:h text:style-name="P126" text:outline-level="2">? Connect With Me</text:h>
      <text:h text:style-name="P127" text:outline-level="3">Social Networks</text:h>
      <text:list text:style-name="LFO7" text:continue-numbering="true">
        <text:list-item>
          <text:p text:style-name="P128"><text:span text:style-name="T129">? </text:span><text:span text:style-name="T130">X/Twitter</text:span><text:span text:style-name="T131">: </text:span><text:a xlink:href="https://x.com/KpgmSol" office:target-frame-name="_top" xlink:show="replace"><text:span text:style-name="T132">@KpgmSol</text:span></text:a><text:span text:style-name="T133"> | </text:span><text:a xlink:href="https://x.com/IosypDavyd1985" office:target-frame-name="_top" xlink:show="replace"><text:span text:style-name="T134">@IosypDavyd1985</text:span></text:a><text:span text:style-name="T135"> | </text:span><text:a xlink:href="https://x.com/SerafimCoin444" office:target-frame-name="_top" xlink:show="replace"><text:span text:style-name="T136">@SerafimCoin444</text:span></text:a></text:p>
        </text:list-item>
        <text:list-item>
          <text:p text:style-name="P137"><text:span text:style-name="T138">? </text:span><text:span text:style-name="T139">Telegram</text:span><text:span text:style-name="T140">: </text:span><text:a xlink:href="https://t.me/KPGM_SOL" office:target-frame-name="_top" xlink:show="replace"><text:span text:style-name="T141">KPGM_SOL</text:span></text:a><text:span text:style-name="T142"> | </text:span><text:a xlink:href="https://t.me/+q9VhY8ypidxiNjRk" office:target-frame-name="_top" xlink:show="replace"><text:span text:style-name="T143">Community Group</text:span></text:a></text:p>
        </text:list-item>
        <text:list-item>
          <text:p text:style-name="P144"><text:span text:style-name="T145">? </text:span><text:span text:style-name="T146">Discord</text:span><text:span text:style-name="T147">: </text:span><text:a xlink:href="https://discord.gg/2VWXC2az" office:target-frame-name="_top" xlink:show="replace"><text:span text:style-name="T148">Join Server</text:span></text:a></text:p>
        </text:list-item>
        <text:list-item>
          <text:p text:style-name="P149"><text:span text:style-name="T150">? </text:span><text:span text:style-name="T151">YouTube</text:span><text:span text:style-name="T152">: </text:span><text:a xlink:href="https://youtube.com/@iosypdavyd_books?si=2S6J8KFf6U_iLOD8" office:target-frame-name="_top" xlink:show="replace"><text:span text:style-name="T153">@iosypdavyd_books</text:span></text:a></text:p>
        </text:list-item>
        <text:list-item>
          <text:p text:style-name="P154"><text:span text:style-name="T155">? </text:span><text:span text:style-name="T156">TikTok</text:span><text:span text:style-name="T157">: </text:span><text:a xlink:href="https://tiktok.com/@kpgm2026" office:target-frame-name="_top" xlink:show="replace"><text:span text:style-name="T158">@kpgm2026</text:span></text:a></text:p>
        </text:list-item>
        <text:list-item>
          <text:p text:style-name="P159"><text:span text:style-name="T160">? </text:span><text:span text:style-name="T161">Medium</text:span><text:span text:style-name="T162">: </text:span><text:a xlink:href="https://medium.com/@ruslanmatey" office:target-frame-name="_top" xlink:show="replace"><text:span text:style-name="T163">@ruslanmatey</text:span></text:a></text:p>
        </text:list-item>
      </text:list>
      <text:h text:style-name="P164" text:outline-level="3">Professional Networks</text:h>
      <text:list text:style-name="LFO8" text:continue-numbering="true">
        <text:list-item>
          <text:p text:style-name="P165"><text:span text:style-name="T166">? </text:span><text:span text:style-name="T167">LinkedIn</text:span><text:span text:style-name="T168">: </text:span><text:a xlink:href="https://www.linkedin.com/in/iosyp-davyd-01bbb82b4" office:target-frame-name="_top" xlink:show="replace"><text:span text:style-name="T169">Iosyp Davyd</text:span></text:a></text:p>
        </text:list-item>
        <text:list-item>
          <text:p text:style-name="P170"><text:span text:style-name="T171">? </text:span><text:span text:style-name="T172">Facebook</text:span><text:span text:style-name="T173">: </text:span><text:a xlink:href="https://www.facebook.com/yosip.david" office:target-frame-name="_top" xlink:show="replace"><text:span text:style-name="T174">Yosip David</text:span></text:a></text:p>
        </text:list-item>
        <text:list-item>
          <text:p text:style-name="P175"><text:span text:style-name="T176">?</text:span><text:span text:style-name="T177">￯ﾸﾏ</text:span><text:span text:style-name="T178"> </text:span><text:span text:style-name="T179">Instagram</text:span><text:span text:style-name="T180">: </text:span><text:a xlink:href="https://www.instagram.com/serafim4442025" office:target-frame-name="_top" xlink:show="replace"><text:span text:style-name="T181">@serafim4442025</text:span></text:a></text:p>
        </text:list-item>
        <text:list-item>
          <text:p text:style-name="P182"><text:span text:style-name="T183">? </text:span><text:span text:style-name="T184">Reddit</text:span><text:span text:style-name="T185">: </text:span><text:a xlink:href="https://www.reddit.com/u/Decent_Impression653" office:target-frame-name="_top" xlink:show="replace"><text:span text:style-name="T186">Decent_Impression653</text:span></text:a></text:p>
        </text:list-item>
      </text:list>
      <text:h text:style-name="P187" text:outline-level="3">Crypto<text:s/>Platforms</text:h>
      <text:list text:style-name="LFO9" text:continue-numbering="true">
        <text:list-item>
          <text:p text:style-name="P188"><text:span text:style-name="T189">? </text:span><text:span text:style-name="T190">CoinMarketCap</text:span><text:span text:style-name="T191">: @User_hzov86453813</text:span></text:p>
        </text:list-item>
        <text:list-item>
          <text:p text:style-name="P192"><text:span text:style-name="T193">? </text:span><text:span text:style-name="T194">Gecko Terminal</text:span><text:span text:style-name="T195">: @User_hzov86453813</text:span></text:p>
        </text:list-item>
      </text:list>
      <text:p text:style-name="HorizontalLine"/>
      <text:h text:style-name="P196" text:outline-level="2"><text:span text:style-name="T197">?</text:span><text:span text:style-name="T198">￯ﾸﾏ</text:span><text:span text:style-name="T199"><text:s/></text:span><text:span text:style-name="T200">Skills &amp;</text:span><text:span text:style-name="T201"><text:s/>Technologies</text:span></text:h>
      <text:list text:style-name="LFO10" text:continue-numbering="true">
        <text:list-item>
          <text:p text:style-name="P202"><text:span text:style-name="T203">Blockchain</text:span><text:span text:style-name="T204">: Solana, Smart Contracts</text:span></text:p>
        </text:list-item>
        <text:list-item>
          <text:p text:style-name="P205"><text:span text:style-name="T206">DeFi Platforms</text:span><text:span text:style-name="T207">: Raydium.io, SPL Tokens</text:span></text:p>
        </text:list-item>
        <text:list-item>
          <text:p text:style-name="P208"><text:span text:style-name="T209">Community Building</text:span><text:span text:style-name="T210">: Discord, Telegram, Social Media Management</text:span></text:p>
        </text:list-item>
        <text:list-item>
          <text:p text:style-name="P211"><text:span text:style-name="T212">Content Creation</text:span><text:span text:style-name="T213">: YouTube, TikTok, Medium, Twitter</text:span></text:p>
        </text:list-item>
        <text:list-item>
          <text:p text:style-name="P214"><text:span text:style-name="T215">Crypto Analytics</text:span><text:span text:style-name="T216">: CoinMarketCap, Gecko Terminal</text:span></text:p>
        </text:list-item>
      </text:list>
      <text:p text:style-name="HorizontalLine"/>
      <text:h text:style-name="P217" text:outline-level="2">? GitHub Statistics</text:h>
      <text:p text:style-name="P218"/>
      <text:p text:style-name="HorizontalLine"/>
      <text:h text:style-name="P219" text:outline-level="2">? My Mission</text:h>
      <text:p text:style-name="P220">Building sustainable Web3 projects with:</text:p>
      <text:list text:style-name="LFO11" text:continue-numbering="true">
        <text:list-item>
          <text:p text:style-name="P221"><text:span text:style-name="T222">✅</text:span><text:span text:style-name="T223"><text:s/></text:span><text:span text:style-name="T224">Strong, engaged communities</text:span></text:p>
        </text:list-item>
        <text:list-item>
          <text:p text:style-name="P225"><text:span text:style-name="T226">✅</text:span><text:span text:style-name="T227"><text:s/></text:span><text:span text:style-name="T228">Transparent development practices</text:span></text:p>
        </text:list-item>
        <text:list-item>
          <text:p text:style-name="P229"><text:span text:style-name="T230">✅</text:span><text:span text:style-name="T231"><text:s/></text:span><text:span text:style-name="T232">Multi-platform presence &amp;</text:span><text:span text:style-name="T233"><text:s/>engagement</text:span></text:p>
        </text:list-item>
        <text:list-item>
          <text:p text:style-name="P234"><text:span text:style-name="T235">✅</text:span><text:span text:style-name="T236"><text:s/></text:span><text:span text:style-name="T237">Innovative tokenomics on Solana</text:span></text:p>
        </text:list-item>
      </text:list>
      <text:p text:style-name="HorizontalLine"/>
      <text:h text:style-name="P238" text:outline-level="2">? Let's Collaborate</text:h>
      <text:p text:style-name="P239">I'm always open to:</text:p>
      <text:list text:style-name="LFO12" text:continue-numbering="true">
        <text:list-item>
          <text:p text:style-name="P240">? Collaborating on blockchain projects</text:p>
        </text:list-item>
        <text:list-item>
          <text:p text:style-name="P241">? Discussing Web3 innovations</text:p>
        </text:list-item>
        <text:list-item>
          <text:p text:style-name="P242">? Building communities around shared interests</text:p>
        </text:list-item>
        <text:list-item>
          <text:p text:style-name="P243">? Cross-platform partnerships</text:p>
        </text:list-item>
      </text:list>
      <text:p text:style-name="HorizontalLine"/>
      <text:h text:style-name="P244" text:outline-level="2"><text:span text:style-name="T245">⭐</text:span><text:span text:style-name="T246"><text:s/></text:span><text:span text:style-name="T247">Support My Work</text:span></text:h>
      <text:p text:style-name="P248">If<text:s/>you find value in my projects:</text:p>
      <text:list text:style-name="LFO13" text:continue-numbering="true">
        <text:list-item>
          <text:p text:style-name="P249"><text:span text:style-name="T250">⭐</text:span><text:span text:style-name="T251"><text:s/></text:span><text:span text:style-name="T252">Star my repositories</text:span></text:p>
        </text:list-item>
        <text:list-item>
          <text:p text:style-name="P253">? Follow on social media</text:p>
        </text:list-item>
        <text:list-item>
          <text:p text:style-name="P254">? Join our community</text:p>
        </text:list-item>
        <text:list-item>
          <text:p text:style-name="P255">? Share feedback and ideas</text:p>
        </text:list-item>
      </text:list>
      <text:p text:style-name="HorizontalLine"/>
      <text:p text:style-name="P256"><text:span text:style-name="T257">"Building the future of Web3, one token at a time."</text:span><text:span text:style-name="T258"> ?</text:span><text:span text:style-name="T259">￢ﾜﾨ</text:span></text:p>
      <text:p text:style-name="P260">Last Updated: May 2026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Mona Sans VF" svg:font-family="Mona Sans VF" style:font-family-generic="system"/>
    <style:font-face style:name="Monaspace Neon" svg:font-family="Monaspace Neon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Times New Roman" style:font-name-asian="SimSun"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Heading" style:next-style-name="Textbody" style:default-outline-level="2">
      <style:text-properties style:font-name="Times New Roman" style:font-name-asian="SimSun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text-properties style:font-name="Times New Roman" style:font-name-asian="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border-top="none" fo:border-left="none" fo:border-bottom="0.0104in double #808080" style:border-line-width-bottom="0.0034in 0.0034in 0.0034in" fo:border-right="none" fo:padding="0in" style:shadow="none" fo:margin-bottom="0.1965in"/>
      <style:text-properties fo:font-size="6pt" style:font-size-asian="6pt" style:font-size-complex="6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Courier New" style:font-name-asian="NSimSun" style:font-name-complex="Courier New"/>
    </style:style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3">
      <text:list-level-style-bullet text:level="1" text:style-name="WW_CharLFO3LVL1" text:bullet-char="•">
        <style:list-level-properties text:space-before="0.4909in" text:min-label-width="0in"/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4909in" text:min-label-width="0in"/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4909in" text:min-label-width="0in"/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4909in" text:min-label-width="0in"/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4909in" text:min-label-width="0in"/>
        <style:text-properties style:font-name="OpenSymbol"/>
      </text:list-level-style-bullet>
      <text:list-level-style-bullet text:level="2" text:style-name="WW_CharLFO7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7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7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7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7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7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7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7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4909in" text:min-label-width="0in"/>
        <style:text-properties style:font-name="OpenSymbol"/>
      </text:list-level-style-bullet>
      <text:list-level-style-bullet text:level="2" text:style-name="WW_CharLFO8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8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8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8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8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8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8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8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4909in" text:min-label-width="0in"/>
        <style:text-properties style:font-name="OpenSymbol"/>
      </text:list-level-style-bullet>
      <text:list-level-style-bullet text:level="2" text:style-name="WW_CharLFO9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9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9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9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9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9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9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9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4909in" text:min-label-width="0in"/>
        <style:text-properties style:font-name="OpenSymbol"/>
      </text:list-level-style-bullet>
      <text:list-level-style-bullet text:level="2" text:style-name="WW_CharLFO10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0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0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0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0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0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0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0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4909in" text:min-label-width="0in"/>
        <style:text-properties style:font-name="OpenSymbol"/>
      </text:list-level-style-bullet>
      <text:list-level-style-bullet text:level="2" text:style-name="WW_CharLFO11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1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1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1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1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1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1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1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4909in" text:min-label-width="0in"/>
        <style:text-properties style:font-name="OpenSymbol"/>
      </text:list-level-style-bullet>
      <text:list-level-style-bullet text:level="2" text:style-name="WW_CharLFO12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2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2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2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2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2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2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2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4909in" text:min-label-width="0in"/>
        <style:text-properties style:font-name="OpenSymbol"/>
      </text:list-level-style-bullet>
      <text:list-level-style-bullet text:level="2" text:style-name="WW_CharLFO13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3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3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3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3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3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3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3LVL9" text:bullet-char="•">
        <style:list-level-properties text:space-before="4.2222in" text:min-label-width="0.1965in"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iosyp davyd</meta:initial-creator>
    <dc:creator>admini</dc:creator>
    <meta:creation-date>2026-05-23T11:56:00Z</meta:creation-date>
    <dc:date>2026-06-14T08:58:00Z</dc:date>
    <meta:template xlink:href="Normal.dotm" xlink:type="simple"/>
    <meta:editing-cycles>2</meta:editing-cycles>
    <meta:editing-duration>PT900S</meta:editing-duration>
    <meta:document-statistic meta:page-count="1" meta:paragraph-count="14" meta:word-count="4591" meta:character-count="7195" meta:row-count="21" meta:non-whitespace-character-count="2618"/>
  </office:meta>
</office:document-meta>
</file>