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ona Sans VF" svg:font-family="Mona Sans VF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widows="2" fo:orphans="2" fo:break-before="page"/>
    </style:style>
    <style:style style:name="T2" style:parent-style-name="DefaultParagraphFont" style:family="text">
      <style:text-properties style:font-name="Mona Sans VF" fo:font-weight="bold" style:font-weight-asian="bold" fo:color="#1F2328"/>
    </style:style>
  </office:automatic-styles>
  <office:body>
    <office:text text:use-soft-page-breaks="true">
      <text:p text:style-name="P1"><text:span text:style-name="T2">README.md</text:span></text:p>
      <text:p text:style-name="Standard"/>
      <text:p text:style-name="Standard">#<text:s/>👋<text:s/>Welcome to My GitHub Profile</text:p>
      <text:p text:style-name="Standard"/>
      <text:p text:style-name="Standard">**Blockchain Developer &amp; Memtoken Creator** | Building on **Solana** with **Raydium.io**</text:p>
      <text:p text:style-name="Standard"/>
      <text:p text:style-name="Standard">---</text:p>
      <text:p text:style-name="Standard"/>
      <text:p text:style-name="Standard">##<text:s/>🚀<text:s/>About Me</text:p>
      <text:p text:style-name="Standard"/>
      <text:p text:style-name="Standard">I'm a blockchain developer and crypto enthusiast focused on creating innovative memtokens on the Solana network. I specialize in building projects using Raydium.io and fostering strong communities around Web3 initiatives.</text:p>
      <text:p text:style-name="Standard"/>
      <text:p text:style-name="Standard">-<text:s/>🔗<text:s/>**Blockchain Focus**: Solana Network &amp; DeFi Projects</text:p>
      <text:p text:style-name="Standard">-<text:s/>💎<text:s/>**Creator**: Multiple memtokens with active communities</text:p>
      <text:p text:style-name="Standard">-<text:s/>🌱<text:s/>**Builder**: Leveraging Raydium.io for token launches</text:p>
      <text:p text:style-name="Standard">-<text:s/>🤝<text:s/>**Community Focused**: Engaging across multiple platforms</text:p>
      <text:p text:style-name="Standard">- ✨ **Mission**: Creating valuable Web3 experiences</text:p>
      <text:p text:style-name="Standard"/>
      <text:p text:style-name="Standard">---</text:p>
      <text:p text:style-name="Standard"/>
      <text:p text:style-name="Standard">##<text:s/>💎<text:s/>Featured Projects</text:p>
      <text:p text:style-name="Standard"/>
      <text:p text:style-name="Standard">### **KPGM** - Key Power Grail Mystery</text:p>
      <text:p text:style-name="Standard">- **Token Address**: `EBRBXt79AyC2TVDLQAoBB6L7fgsctqS7DTevkwPuhray`</text:p>
      <text:p text:style-name="Standard">- **Platform**: Raydium.io</text:p>
      <text:p text:style-name="Standard">- **Status**: Active &amp;<text:s/>Growing Community</text:p>
      <text:p text:style-name="Standard">- **Description**: Strong community-driven memtoken on Solana</text:p>
      <text:p text:style-name="Standard"/>
      <text:p text:style-name="Standard">### **JKPGM**</text:p>
      <text:p text:style-name="Standard">- **Token Address**: `8bHmWm3vRUqfpXKszGnYyzLbwMtcN9bb7bZceUatEray`</text:p>
      <text:p text:style-name="Standard">- **Platform**: Raydium.io</text:p>
      <text:p text:style-name="Standard"/>
      <text:p text:style-name="Standard">### **XRPTC**</text:p>
      <text:p text:style-name="Standard">- **Token Address**: `D3a2hQhYJsaU7UUuJgjmDzLhSaohWP9PCmm6Umip8ray`</text:p>
      <text:p text:style-name="Standard">- **Platform**: Raydium.io</text:p>
      <text:p text:style-name="Standard"/>
      <text:p text:style-name="Standard">---</text:p>
      <text:p text:style-name="Standard"/>
      <text:p text:style-name="Standard">##<text:s/>🔗<text:s/>Connect With Me</text:p>
      <text:p text:style-name="Standard"/>
      <text:p text:style-name="Standard">### Social Networks</text:p>
      <text:p text:style-name="Standard">-<text:s/>🐦<text:s/>**X/Twitter**: [@KpgmSol](https://x.com/KpgmSol) | [@IosypDavyd1985](https://x.com/IosypDavyd1985) | [@SerafimCoin444](https://x.com/SerafimCoin444)</text:p>
      <text:p text:style-name="Standard">-<text:s/>📱<text:s/>**Telegram**: [KPGM_SOL](https://t.me/KPGM_SOL) | [Community Group](https://t.me/+q9VhY8ypidxiNjRk)</text:p>
      <text:p text:style-name="Standard">-<text:s/>💬<text:s/>**Discord**: [Join Server](https://discord.gg/2VWXC2az)</text:p>
      <text:p text:style-name="Standard">-<text:s/>📺<text:s/>**YouTube**: [@iosypdavyd_books](https://youtube.com/@iosypdavyd_books?si=2S6J8KFf6U_iLOD8)</text:p>
      <text:p text:style-name="Standard">-<text:s/>🎬<text:s/>**TikTok**: [@kpgm2026](https://tiktok.com/@kpgm2026)</text:p>
      <text:p text:style-name="Standard">-<text:s/>📖<text:s/>**Medium**: [@ruslanmatey](https://medium.com/@ruslanmatey)</text:p>
      <text:p text:style-name="Standard"/>
      <text:p text:style-name="Standard">### Professional Networks</text:p>
      <text:p text:style-name="Standard">-<text:s/>💼<text:s/>**LinkedIn**: [Iosyp Davyd](https://www.linkedin.com/in/iosyp-davyd-01bbb82b4)</text:p>
      <text:p text:style-name="Standard">-<text:s/>📘<text:s/>**Facebook**: [Yosip David](https://www.facebook.com/yosip.david)</text:p>
      <text:p text:style-name="Standard">-<text:s/>🖼️<text:s/>**Instagram**: [@serafim4442025](https://www.instagram.com/serafim4442025)</text:p>
      <text:p text:style-name="Standard">-<text:s/>🔍<text:s/>**Reddit**: [Decent_Impression653](https://www.reddit.com/u/Decent_Impression653)</text:p>
      <text:p text:style-name="Standard"/>
      <text:p text:style-name="Standard">### Crypto Platforms</text:p>
      <text:p text:style-name="Standard">-<text:s/>📊<text:s/>**CoinMarketCap**: @User_hzov86453813</text:p>
      <text:p text:style-name="Standard">-<text:s/>📈<text:s/>**Gecko Terminal**: @User_hzov86453813</text:p>
      <text:p text:style-name="Standard"/>
      <text:p text:style-name="Standard">---</text:p>
      <text:p text:style-name="Standard"/>
      <text:p text:style-name="Standard">##<text:s/>🛠️<text:s/>Skills &amp;<text:s/>Technologies</text:p>
      <text:p text:style-name="Standard"/>
      <text:p text:style-name="Standard">- **Blockchain**: Solana, Smart Contracts</text:p>
      <text:p text:style-name="Standard">- **DeFi Platforms**: Raydium.io, SPL Tokens</text:p>
      <text:p text:style-name="Standard">- **Community Building**: Discord, Telegram, Social Media Management</text:p>
      <text:p text:style-name="Standard">- **Content Creation**: YouTube, TikTok, Medium, Twitter</text:p>
      <text:p text:style-name="Standard">- **Crypto Analytics**: CoinMarketCap, Gecko Terminal</text:p>
      <text:p text:style-name="Standard"/>
      <text:p text:style-name="Standard">---</text:p>
      <text:p text:style-name="Standard"/>
      <text:p text:style-name="Standard">##<text:s/>📊<text:s/>GitHub Statistics</text:p>
      <text:p text:style-name="Standard"/>
      <text:p text:style-name="Standard">![GitHub Stats](https://github-readme-stats.vercel.app/api?username=IosypDavyd&amp;show_icons=true&amp;theme=radical)</text:p>
      <text:p text:style-name="Standard"/>
      <text:p text:style-name="Standard">![Top Languages](https://github-readme-stats.vercel.app/api/top-langs/?username=IosypDavyd&amp;layout=compact&amp;theme=radical)</text:p>
      <text:p text:style-name="Standard"/>
      <text:p text:style-name="Standard">---</text:p>
      <text:p text:style-name="Standard"/>
      <text:p text:style-name="Standard">##<text:s/>🎯<text:s/>My Mission</text:p>
      <text:p text:style-name="Standard"/>
      <text:p text:style-name="Standard">Building sustainable Web3 projects with:</text:p>
      <text:p text:style-name="Standard">- ✅ Strong, engaged communities</text:p>
      <text:p text:style-name="Standard">- ✅ Transparent development practices</text:p>
      <text:p text:style-name="Standard">- ✅ Multi-platform presence &amp;<text:s/>engagement</text:p>
      <text:p text:style-name="Standard">- ✅ Innovative tokenomics on Solana</text:p>
      <text:p text:style-name="Standard"/>
      <text:p text:style-name="Standard">---</text:p>
      <text:p text:style-name="Standard"/>
      <text:p text:style-name="Standard">##<text:s/>📈<text:s/>Let's Collaborate</text:p>
      <text:p text:style-name="Standard"/>
      <text:p text:style-name="Standard">I'm always open to:</text:p>
      <text:p text:style-name="Standard">-<text:s/>🤝<text:s/>Collaborating on blockchain projects</text:p>
      <text:p text:style-name="Standard">-<text:s/>💡<text:s/>Discussing Web3 innovations</text:p>
      <text:p text:style-name="Standard">-<text:s/>🚀<text:s/>Building communities around shared interests</text:p>
      <text:p text:style-name="Standard">-<text:s/>📡<text:s/>Cross-platform partnerships</text:p>
      <text:p text:style-name="Standard"/>
      <text:p text:style-name="Standard">---</text:p>
      <text:p text:style-name="Standard"/>
      <text:p text:style-name="Standard">##<text:s/>⭐<text:s/>Support My Work</text:p>
      <text:p text:style-name="Standard"/>
      <text:p text:style-name="Standard">If you find value in my projects:</text:p>
      <text:p text:style-name="Standard">-<text:s/>⭐<text:s/>Star my repositories</text:p>
      <text:p text:style-name="Standard">-<text:s/>🔔<text:s/>Follow on social media</text:p>
      <text:p text:style-name="Standard">-<text:s/>💬<text:s/>Join our community</text:p>
      <text:p text:style-name="Standard">-<text:s/>🤝<text:s/>Share feedback and ideas</text:p>
      <text:p text:style-name="Standard"/>
      <text:p text:style-name="Standard">---</text:p>
      <text:p text:style-name="Standard"/>
      <text:p text:style-name="Standard">**"Building the future of Web3, one token at a time."**<text:s/>🚀✨</text:p>
      <text:p text:style-name="Standard"/>
      <text:p text:style-name="Standard">Last Updated: May 2026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ona Sans VF" svg:font-family="Mona Sans VF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iosyp davyd</meta:initial-creator>
    <dc:creator>admini</dc:creator>
    <meta:creation-date>2026-06-13T15:06:00Z</meta:creation-date>
    <dc:date>2026-06-14T09:27:00Z</dc:date>
    <meta:template xlink:href="Normal.dotm" xlink:type="simple"/>
    <meta:editing-cycles>2</meta:editing-cycles>
    <meta:editing-duration>PT0S</meta:editing-duration>
    <meta:document-statistic meta:page-count="1" meta:paragraph-count="6" meta:word-count="2201" meta:character-count="3450" meta:row-count="10" meta:non-whitespace-character-count="1255"/>
  </office:meta>
</office:document-meta>
</file>